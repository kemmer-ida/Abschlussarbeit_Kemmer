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9cm"/>
    </style:style>
    <style:style style:name="co3" style:family="table-column">
      <style:table-column-properties fo:break-before="auto" style:column-width="2.861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5.606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3.429cm"/>
    </style:style>
    <style:style style:name="co13" style:family="table-column">
      <style:table-column-properties fo:break-before="auto" style:column-width="2.574cm"/>
    </style:style>
    <style:style style:name="co14" style:family="table-column">
      <style:table-column-properties fo:break-before="auto" style:column-width="2.551cm"/>
    </style:style>
    <style:style style:name="co15" style:family="table-column">
      <style:table-column-properties fo:break-before="auto" style:column-width="2.946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3.454cm"/>
    </style:style>
    <style:style style:name="co18" style:family="table-column">
      <style:table-column-properties fo:break-before="auto" style:column-width="2.385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69" style:family="table-cell" style:parent-style-name="Default" style:data-style-name="N120">
      <style:table-cell-properties fo:border="0.74pt solid #000000"/>
    </style:style>
    <style:style style:name="ce170" style:family="table-cell" style:parent-style-name="Default" style:data-style-name="N120">
      <style:table-cell-properties fo:background-color="#e0c2cd" fo:border="0.74pt solid #000000"/>
    </style:style>
    <style:style style:name="ce171" style:family="table-cell" style:parent-style-name="Default">
      <style:table-cell-properties fo:background-color="transparent" fo:border="0.74pt solid #000000"/>
    </style:style>
    <style:style style:name="ce172" style:family="table-cell" style:parent-style-name="Default" style:data-style-name="N120">
      <style:table-cell-properties fo:background-color="#dde8cb" fo:border="0.74pt solid #0000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120">
      <style:table-cell-properties fo:background-color="#ffd7d7" fo:border="0.74pt solid #000000"/>
    </style:style>
    <style:style style:name="ce175" style:family="table-cell" style:parent-style-name="Default">
      <style:table-cell-properties fo:background-color="#ffff00" fo:border="0.74pt solid #000000"/>
    </style:style>
    <style:style style:name="ce176" style:family="table-cell" style:parent-style-name="Default" style:data-style-name="N121"/>
    <style:style style:name="ce1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9" style:family="table-cell" style:parent-style-name="Default">
      <style:table-cell-properties fo:border-bottom="none" fo:border-left="0.74pt solid #000000" fo:border-right="0.74pt solid #000000" fo:border-top="none"/>
    </style:style>
    <style:style style:name="ce1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1" style:family="table-cell" style:parent-style-name="Default" style:data-style-name="N120">
      <style:table-cell-properties fo:border-bottom="0.74pt solid #000000" fo:border-left="none" fo:border-right="none" fo:border-top="0.74pt solid #000000"/>
    </style:style>
    <style:style style:name="ce152" style:family="table-cell" style:parent-style-name="Default" style:data-style-name="N120">
      <style:table-cell-properties fo:border-bottom="0.74pt solid #000000" fo:border-left="0.74pt solid #000000" fo:border-right="none" fo:border-top="0.74pt solid #000000"/>
    </style:style>
    <style:style style:name="ce153" style:family="table-cell" style:parent-style-name="Default" style:data-style-name="N120">
      <style:table-cell-properties fo:border-bottom="none" fo:border-left="0.74pt solid #000000" fo:border-right="none" fo:border-top="0.74pt solid #000000"/>
    </style:style>
    <style:style style:name="ce154" style:family="table-cell" style:parent-style-name="Default" style:data-style-name="N120">
      <style:table-cell-properties fo:border-bottom="none" fo:border-left="0.74pt solid #000000" fo:border-right="none" fo:border-top="none"/>
    </style:style>
    <style:style style:name="ce155" style:family="table-cell" style:parent-style-name="Default" style:data-style-name="N120">
      <style:table-cell-properties fo:border-bottom="0.74pt solid #000000" fo:border-left="0.74pt solid #000000" fo:border-right="none" fo:border-top="none"/>
    </style:style>
    <style:style style:name="ce156" style:family="table-cell" style:parent-style-name="Default" style:data-style-name="N120">
      <style:table-cell-properties fo:border-bottom="none" fo:border-left="none" fo:border-right="none" fo:border-top="0.74pt solid #000000"/>
    </style:style>
    <style:style style:name="ce157" style:family="table-cell" style:parent-style-name="Default" style:data-style-name="N120"/>
    <style:style style:name="ce158" style:family="table-cell" style:parent-style-name="Default" style:data-style-name="N120">
      <style:table-cell-properties fo:border-bottom="0.74pt solid #000000" fo:border-left="none" fo:border-right="none" fo:border-top="none"/>
    </style:style>
    <style:style style:name="ce159" style:family="table-cell" style:parent-style-name="Default" style:data-style-name="N120">
      <style:table-cell-properties fo:border="none"/>
    </style:style>
    <style:style style:name="ce160" style:family="table-cell" style:parent-style-name="Default" style:data-style-name="N120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 style:data-style-name="N120">
      <style:table-cell-properties fo:border-bottom="none" fo:border-left="none" fo:border-right="0.74pt solid #000000" fo:border-top="0.74pt solid #000000"/>
    </style:style>
    <style:style style:name="ce162" style:family="table-cell" style:parent-style-name="Default" style:data-style-name="N120">
      <style:table-cell-properties fo:border-bottom="none" fo:border-left="none" fo:border-right="0.74pt solid #000000" fo:border-top="none"/>
    </style:style>
    <style:style style:name="ce163" style:family="table-cell" style:parent-style-name="Default" style:data-style-name="N120">
      <style:table-cell-properties fo:border-bottom="0.74pt solid #000000" fo:border-left="none" fo:border-right="0.74pt solid #000000" fo:border-top="none"/>
    </style:style>
    <style:style style:name="ce164" style:family="table-cell" style:parent-style-name="Default">
      <style:table-cell-properties fo:border-bottom="0.74pt solid #000000" fo:border-left="none" fo:border-right="none" fo:border-top="0.74pt solid #000000"/>
    </style:style>
    <style:style style:name="ce16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ibertherm ungeordn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73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3"/>
        <table:table-column table:style-name="co11" table:default-cell-style-name="ce173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Probe</text:p>
          </table:table-cell>
          <table:table-cell table:style-name="ce1" office:value-type="string" calcext:value-type="string">
            <text:p>FiberBag Nr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 (ADF)</text:p>
          </table:table-cell>
          <table:table-cell table:style-name="ce1" office:value-type="string" calcext:value-type="string">
            <text:p>C1 (ADF)</text:p>
          </table:table-cell>
          <table:table-cell table:style-name="ce171" office:value-type="string" calcext:value-type="string">
            <text:p>ADF (as received basis) [%]</text:p>
          </table:table-cell>
          <table:table-cell table:style-name="ce171" office:value-type="string" calcext:value-type="string">
            <text:p>ADF (DM basis) [%]</text:p>
          </table:table-cell>
          <table:table-cell table:style-name="ce1" table:number-columns-repeated="2"/>
          <table:table-cell table:style-name="ce1" office:value-type="string" calcext:value-type="string">
            <text:p>W3 ADL</text:p>
          </table:table-cell>
          <table:table-cell table:style-name="ce1" office:value-type="string" calcext:value-type="string">
            <text:p>C1 ADL</text:p>
          </table:table-cell>
          <table:table-cell table:style-name="ce171" office:value-type="string" calcext:value-type="string">
            <text:p>ADL (as received </text:p>
            <text:p>Basis) [%]</text:p>
          </table:table-cell>
          <table:table-cell table:style-name="ce171" office:value-type="string" calcext:value-type="string">
            <text:p>ADL (DM basis) [%]</text:p>
          </table:table-cell>
          <table:table-cell table:style-name="ce1" office:value-type="string" calcext:value-type="string">
            <text:p>DM</text:p>
          </table:table-cell>
          <table:table-cell table:style-name="ce1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W4</text:p>
          </table:table-cell>
          <table:table-cell table:style-name="ce175" office:value-type="string" calcext:value-type="string">
            <text:p>ADL Anteil [%]</text:p>
          </table:table-cell>
          <table:table-cell table:style-name="ce175" office:value-type="string" calcext:value-type="string">
            <text:p>Aschegehalt [%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be</text:p>
          </table:table-cell>
          <table:table-cell table:style-name="ce1" office:value-type="string" calcext:value-type="string">
            <text:p>FiberBag Nr</text:p>
          </table:table-cell>
          <table:table-cell table:style-name="ce1" office:value-type="string" calcext:value-type="string">
            <text:p>Gewicht Fiberbag</text:p>
          </table:table-cell>
          <table:table-cell table:style-name="ce1" office:value-type="string" calcext:value-type="string">
            <text:p>Probeneinwaage</text:p>
          </table:table-cell>
          <table:table-cell table:style-name="ce1" office:value-type="string" calcext:value-type="string">
            <text:p>Gewicht nach 1. Lauf und </text:p>
            <text:p>Trocknung bei 105°C</text:p>
          </table:table-cell>
          <table:table-cell table:style-name="ce1" office:value-type="string" calcext:value-type="string">
            <text:p>Leerbeutelkorrektur</text:p>
            <text:p>ADF</text:p>
          </table:table-cell>
          <table:table-cell table:style-name="ce171" office:value-type="string" calcext:value-type="string">
            <text:p>ADF-Anteil</text:p>
          </table:table-cell>
          <table:table-cell table:style-name="ce171" office:value-type="string" calcext:value-type="string">
            <text:p>ADF DM-Anteil</text:p>
          </table:table-cell>
          <table:table-cell table:style-name="ce1" office:value-type="string" calcext:value-type="string">
            <text:p>Leergewicht Tiegel + Deckel</text:p>
          </table:table-cell>
          <table:table-cell table:style-name="ce1" office:value-type="string" calcext:value-type="string">
            <text:p>Veraschungstiegel &amp; getrockneter </text:p>
            <text:p>FiberBag nach Aufschluss</text:p>
          </table:table-cell>
          <table:table-cell table:style-name="ce1" office:value-type="string" calcext:value-type="string">
            <text:p>Gewicht Fiberbag +</text:p>
            <text:p>Probe nach ADL</text:p>
          </table:table-cell>
          <table:table-cell table:style-name="ce1" office:value-type="string" calcext:value-type="string">
            <text:p>Leerbeutelkorrektur</text:p>
            <text:p>ADL</text:p>
          </table:table-cell>
          <table:table-cell table:style-name="ce171" office:value-type="string" calcext:value-type="string">
            <text:p>ADL-Anteil</text:p>
          </table:table-cell>
          <table:table-cell table:style-name="ce171" office:value-type="string" calcext:value-type="string">
            <text:p>ADL DM-Anteil</text:p>
          </table:table-cell>
          <table:table-cell table:style-name="ce1" office:value-type="string" calcext:value-type="string">
            <text:p>Trockenmasse</text:p>
          </table:table-cell>
          <table:table-cell table:style-name="ce1" office:value-type="string" calcext:value-type="string">
            <text:p>Veraschungstiegel </text:p>
            <text:p>&amp; Asche</text:p>
          </table:table-cell>
          <table:table-cell table:style-name="ce1" office:value-type="string" calcext:value-type="string">
            <text:p>Leerbeutelkorrektur </text:p>
            <text:p>Veraschung</text:p>
          </table:table-cell>
          <table:table-cell table:style-name="ce1" office:value-type="string" calcext:value-type="string">
            <text:p>Gesamtgewicht vor Veraschung-</text:p>
            <text:p>Gesamtgewicht nach Veraschung</text:p>
          </table:table-cell>
          <table:table-cell table:style-name="ce175" office:value-type="string" calcext:value-type="string">
            <text:p>ADL OM basis</text:p>
          </table:table-cell>
          <table:table-cell table:style-name="ce175" office:value-type="string" calcext:value-type="string">
            <text:p>Aschegehal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lank</text:p>
          </table:table-cell>
          <table:table-cell table:style-name="ce1" office:value-type="float" office:value="1" calcext:value-type="float">
            <text:p>1</text:p>
          </table:table-cell>
          <table:table-cell table:style-name="ce169" office:value-type="float" office:value="0.4262" calcext:value-type="float">
            <text:p>0.4262</text:p>
          </table:table-cell>
          <table:table-cell table:style-name="ce169" office:value-type="float" office:value="0" calcext:value-type="float">
            <text:p>0.0000</text:p>
          </table:table-cell>
          <table:table-cell table:style-name="ce169" office:value-type="float" office:value="0.4258" calcext:value-type="float">
            <text:p>0.4258</text:p>
          </table:table-cell>
          <table:table-cell table:style-name="ce170" table:formula="of:=[.E3]/[.C3]" office:value-type="float" office:value="0.999061473486626" calcext:value-type="float">
            <text:p>0.9991</text:p>
          </table:table-cell>
          <table:table-cell table:style-name="ce172" table:number-columns-repeated="2"/>
          <table:table-cell table:style-name="ce169" office:value-type="float" office:value="20.4679" calcext:value-type="float">
            <text:p>20.4679</text:p>
          </table:table-cell>
          <table:table-cell table:style-name="ce169" office:value-type="float" office:value="20.8939" calcext:value-type="float">
            <text:p>20.8939</text:p>
          </table:table-cell>
          <table:table-cell table:style-name="ce169" table:formula="of:=[.J3]-[.I3]" office:value-type="float" office:value="0.425999999999998" calcext:value-type="float">
            <text:p>0.4260</text:p>
          </table:table-cell>
          <table:table-cell table:style-name="ce170" table:formula="of:=[.K3]/[.C3]" office:value-type="float" office:value="0.999530736743309" calcext:value-type="float">
            <text:p>0.9995</text:p>
          </table:table-cell>
          <table:table-cell table:style-name="ce172" table:number-columns-repeated="2"/>
          <table:table-cell table:style-name="ce174"/>
          <table:table-cell table:style-name="ce169" office:value-type="float" office:value="20.4688" calcext:value-type="float">
            <text:p>20.4688</text:p>
          </table:table-cell>
          <table:table-cell table:style-name="ce170" table:formula="of:=[.R3]/[.C3]" office:value-type="float" office:value="0.997419052088214" calcext:value-type="float">
            <text:p>0.9974</text:p>
          </table:table-cell>
          <table:table-cell table:style-name="ce169" table:formula="of:=[.J3]-[.P3]" office:value-type="float" office:value="0.425099999999997" calcext:value-type="float">
            <text:p>0.4251</text:p>
          </table:table-cell>
          <table:table-cell table:style-name="ce17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IK 9</text:p>
          </table:table-cell>
          <table:table-cell table:style-name="ce1" office:value-type="float" office:value="2" calcext:value-type="float">
            <text:p>2</text:p>
          </table:table-cell>
          <table:table-cell table:style-name="ce169" office:value-type="float" office:value="0.4268" calcext:value-type="float">
            <text:p>0.4268</text:p>
          </table:table-cell>
          <table:table-cell table:style-name="ce169" office:value-type="float" office:value="0.9999" calcext:value-type="float">
            <text:p>0.9999</text:p>
          </table:table-cell>
          <table:table-cell table:style-name="ce169" office:value-type="float" office:value="1.3008" calcext:value-type="float">
            <text:p>1.3008</text:p>
          </table:table-cell>
          <table:table-cell table:style-name="ce169"/>
          <table:table-cell table:style-name="ce172" table:formula="of:=([.E4]-([.C4]*[.$F$3]))/[.D4]*100" office:value-type="float" office:value="87.44880119171" calcext:value-type="float">
            <text:p>87.4488</text:p>
          </table:table-cell>
          <table:table-cell table:style-name="ce172" table:formula="of:=([.E4]-([.C4]*[.$F$3]))/([.D4]*[.O4])*100" office:value-type="float" office:value="90.414393291677" calcext:value-type="float">
            <text:p>90.4144</text:p>
          </table:table-cell>
          <table:table-cell table:style-name="ce169" office:value-type="float" office:value="22.0931" calcext:value-type="float">
            <text:p>22.0931</text:p>
          </table:table-cell>
          <table:table-cell table:style-name="ce169" office:value-type="float" office:value="23.2564" calcext:value-type="float">
            <text:p>23.2564</text:p>
          </table:table-cell>
          <table:table-cell table:style-name="ce169" table:formula="of:=[.J4]-[.I4]" office:value-type="float" office:value="1.1633" calcext:value-type="float">
            <text:p>1.1633</text:p>
          </table:table-cell>
          <table:table-cell table:style-name="ce169"/>
          <table:table-cell table:style-name="ce172" table:formula="of:=([.K4]-([.C4]*[.$L$3]))/[.D4]*100" office:value-type="float" office:value="73.6773958953851" calcext:value-type="float">
            <text:p>73.6774</text:p>
          </table:table-cell>
          <table:table-cell table:style-name="ce172" table:formula="of:=([.K4]-([.C4]*[.$L$3]))/([.D4]*[.O4])*100" office:value-type="float" office:value="76.1759676337728" calcext:value-type="float">
            <text:p>76.1760</text:p>
          </table:table-cell>
          <table:table-cell table:style-name="ce174" office:value-type="float" office:value="0.9672" calcext:value-type="float">
            <text:p>0.9672</text:p>
          </table:table-cell>
          <table:table-cell table:style-name="ce169" office:value-type="float" office:value="22.2092" calcext:value-type="float">
            <text:p>22.2092</text:p>
          </table:table-cell>
          <table:table-cell table:style-name="ce169"/>
          <table:table-cell table:style-name="ce169" table:formula="of:=[.J4]-[.P4]" office:value-type="float" office:value="1.0472" calcext:value-type="float">
            <text:p>1.0472</text:p>
          </table:table-cell>
          <table:table-cell table:style-name="ce172" table:formula="of:=([.R4]-([.C4]*[.$Q$3]))/([.D4]*[.O4])*100" office:value-type="float" office:value="64.2642374833793" calcext:value-type="float">
            <text:p>64.2642</text:p>
          </table:table-cell>
          <table:table-cell table:style-name="ce172" table:formula="of:=(([.P4]-[.I4])*[.$Q$3])/[.D4]*100" office:value-type="float" office:value="11.5811933140755" calcext:value-type="float">
            <text:p>11.581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8B</text:p>
          </table:table-cell>
          <table:table-cell table:style-name="ce1" office:value-type="float" office:value="4" calcext:value-type="float">
            <text:p>4</text:p>
          </table:table-cell>
          <table:table-cell table:style-name="ce169" office:value-type="float" office:value="0.4308" calcext:value-type="float">
            <text:p>0.4308</text:p>
          </table:table-cell>
          <table:table-cell table:style-name="ce169" office:value-type="float" office:value="0.9984" calcext:value-type="float">
            <text:p>0.9984</text:p>
          </table:table-cell>
          <table:table-cell table:style-name="ce169" office:value-type="float" office:value="1.0085" calcext:value-type="float">
            <text:p>1.0085</text:p>
          </table:table-cell>
          <table:table-cell table:style-name="ce169"/>
          <table:table-cell table:style-name="ce172" table:formula="of:=([.E5]-([.C5]*[.$F$3]))/[.D5]*100" office:value-type="float" office:value="57.9030766448279" calcext:value-type="float">
            <text:p>57.9031</text:p>
          </table:table-cell>
          <table:table-cell table:style-name="ce172" table:formula="of:=([.E5]-([.C5]*[.$F$3]))/([.D5]*[.O5])*100" office:value-type="float" office:value="61.1178769736414" calcext:value-type="float">
            <text:p>61.1179</text:p>
          </table:table-cell>
          <table:table-cell table:style-name="ce169" office:value-type="float" office:value="22.191" calcext:value-type="float">
            <text:p>22.1910</text:p>
          </table:table-cell>
          <table:table-cell table:style-name="ce169" office:value-type="float" office:value="23.0401" calcext:value-type="float">
            <text:p>23.0401</text:p>
          </table:table-cell>
          <table:table-cell table:style-name="ce169" table:formula="of:=[.J5]-[.I5]" office:value-type="float" office:value="0.8491" calcext:value-type="float">
            <text:p>0.8491</text:p>
          </table:table-cell>
          <table:table-cell table:style-name="ce169"/>
          <table:table-cell table:style-name="ce172" table:formula="of:=([.K5]-([.C5]*[.$L$3]))/[.D5]*100" office:value-type="float" office:value="41.9172835147218" calcext:value-type="float">
            <text:p>41.9173</text:p>
          </table:table-cell>
          <table:table-cell table:style-name="ce172" table:formula="of:=([.K5]-([.C5]*[.$L$3]))/([.D5]*[.O5])*100" office:value-type="float" office:value="44.2445466695396" calcext:value-type="float">
            <text:p>44.2445</text:p>
          </table:table-cell>
          <table:table-cell table:style-name="ce174" office:value-type="float" office:value="0.9474" calcext:value-type="float">
            <text:p>0.9474</text:p>
          </table:table-cell>
          <table:table-cell table:style-name="ce169" office:value-type="float" office:value="22.2329" calcext:value-type="float">
            <text:p>22.2329</text:p>
          </table:table-cell>
          <table:table-cell table:style-name="ce169"/>
          <table:table-cell table:style-name="ce169" table:formula="of:=[.J5]-[.P5]" office:value-type="float" office:value="0.807199999999998" calcext:value-type="float">
            <text:p>0.8072</text:p>
          </table:table-cell>
          <table:table-cell table:style-name="ce172" table:formula="of:=([.R5]-([.C5]*[.$Q$3]))/([.D5]*[.O5])*100" office:value-type="float" office:value="39.9110047852366" calcext:value-type="float">
            <text:p>39.9110</text:p>
          </table:table-cell>
          <table:table-cell table:style-name="ce172" table:formula="of:=(([.P5]-[.I5])*[.$Q$3])/[.D5]*100" office:value-type="float" office:value="4.1858832414361" calcext:value-type="float">
            <text:p>4.185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7</text:p>
          </table:table-cell>
          <table:table-cell table:style-name="ce1" office:value-type="float" office:value="5" calcext:value-type="float">
            <text:p>5</text:p>
          </table:table-cell>
          <table:table-cell table:style-name="ce169" office:value-type="float" office:value="0.4239" calcext:value-type="float">
            <text:p>0.4239</text:p>
          </table:table-cell>
          <table:table-cell table:style-name="ce169" office:value-type="float" office:value="1.0117" calcext:value-type="float">
            <text:p>1.0117</text:p>
          </table:table-cell>
          <table:table-cell table:style-name="ce169" office:value-type="float" office:value="1.262" calcext:value-type="float">
            <text:p>1.2620</text:p>
          </table:table-cell>
          <table:table-cell table:style-name="ce169"/>
          <table:table-cell table:style-name="ce172" table:formula="of:=([.E6]-([.C6]*[.$F$3]))/[.D6]*100" office:value-type="float" office:value="82.8800871196026" calcext:value-type="float">
            <text:p>82.8801</text:p>
          </table:table-cell>
          <table:table-cell table:style-name="ce172" table:formula="of:=([.E6]-([.C6]*[.$F$3]))/([.D6]*[.O6])*100" office:value-type="float" office:value="85.7173307680242" calcext:value-type="float">
            <text:p>85.7173</text:p>
          </table:table-cell>
          <table:table-cell table:style-name="ce169" office:value-type="float" office:value="21.1612" calcext:value-type="float">
            <text:p>21.1612</text:p>
          </table:table-cell>
          <table:table-cell table:style-name="ce169" office:value-type="float" office:value="22.2856" calcext:value-type="float">
            <text:p>22.2856</text:p>
          </table:table-cell>
          <table:table-cell table:style-name="ce169" table:formula="of:=[.J6]-[.I6]" office:value-type="float" office:value="1.1244" calcext:value-type="float">
            <text:p>1.1244</text:p>
          </table:table-cell>
          <table:table-cell table:style-name="ce169"/>
          <table:table-cell table:style-name="ce172" table:formula="of:=([.K6]-([.C6]*[.$L$3]))/[.D6]*100" office:value-type="float" office:value="69.2595552727596" calcext:value-type="float">
            <text:p>69.2596</text:p>
          </table:table-cell>
          <table:table-cell table:style-name="ce172" table:formula="of:=([.K6]-([.C6]*[.$L$3]))/([.D6]*[.O6])*100" office:value-type="float" office:value="71.63052567252" calcext:value-type="float">
            <text:p>71.6305</text:p>
          </table:table-cell>
          <table:table-cell table:style-name="ce174" office:value-type="float" office:value="0.9669" calcext:value-type="float">
            <text:p>0.9669</text:p>
          </table:table-cell>
          <table:table-cell table:style-name="ce169" office:value-type="float" office:value="21.2716" calcext:value-type="float">
            <text:p>21.2716</text:p>
          </table:table-cell>
          <table:table-cell table:style-name="ce169"/>
          <table:table-cell table:style-name="ce169" table:formula="of:=[.J6]-[.P6]" office:value-type="float" office:value="1.014" calcext:value-type="float">
            <text:p>1.0140</text:p>
          </table:table-cell>
          <table:table-cell table:style-name="ce172" table:formula="of:=([.R6]-([.C6]*[.$Q$3]))/([.D6]*[.O6])*100" office:value-type="float" office:value="60.436144990651" calcext:value-type="float">
            <text:p>60.4361</text:p>
          </table:table-cell>
          <table:table-cell table:style-name="ce172" table:formula="of:=(([.P6]-[.I6])*[.$Q$3])/[.D6]*100" office:value-type="float" office:value="10.884161643821" calcext:value-type="float">
            <text:p>10.884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3</text:p>
          </table:table-cell>
          <table:table-cell table:style-name="ce1" office:value-type="float" office:value="6" calcext:value-type="float">
            <text:p>6</text:p>
          </table:table-cell>
          <table:table-cell table:style-name="ce169" office:value-type="float" office:value="0.4255" calcext:value-type="float">
            <text:p>0.4255</text:p>
          </table:table-cell>
          <table:table-cell table:style-name="ce169" office:value-type="float" office:value="1.0024" calcext:value-type="float">
            <text:p>1.0024</text:p>
          </table:table-cell>
          <table:table-cell table:style-name="ce169" office:value-type="float" office:value="1.1304" calcext:value-type="float">
            <text:p>1.1304</text:p>
          </table:table-cell>
          <table:table-cell table:style-name="ce169"/>
          <table:table-cell table:style-name="ce172" table:formula="of:=([.E7]-([.C7]*[.$F$3]))/[.D7]*100" office:value-type="float" office:value="70.3610677405667" calcext:value-type="float">
            <text:p>70.3611</text:p>
          </table:table-cell>
          <table:table-cell table:style-name="ce172" table:formula="of:=([.E7]-([.C7]*[.$F$3]))/([.D7]*[.O7])*100" office:value-type="float" office:value="73.4764700716027" calcext:value-type="float">
            <text:p>73.4765</text:p>
          </table:table-cell>
          <table:table-cell table:style-name="ce169" office:value-type="float" office:value="22.5323" calcext:value-type="float">
            <text:p>22.5323</text:p>
          </table:table-cell>
          <table:table-cell table:style-name="ce169" office:value-type="float" office:value="23.0374" calcext:value-type="float">
            <text:p>23.0374</text:p>
          </table:table-cell>
          <table:table-cell table:style-name="ce169" table:formula="of:=[.J7]-[.I7]" office:value-type="float" office:value="0.505100000000002" calcext:value-type="float">
            <text:p>0.5051</text:p>
          </table:table-cell>
          <table:table-cell table:style-name="ce169"/>
          <table:table-cell table:style-name="ce172" table:formula="of:=([.K7]-([.C7]*[.$L$3]))/[.D7]*100" office:value-type="float" office:value="7.9608610849685" calcext:value-type="float">
            <text:p>7.9609</text:p>
          </table:table-cell>
          <table:table-cell table:style-name="ce172" table:formula="of:=([.K7]-([.C7]*[.$L$3]))/([.D7]*[.O7])*100" office:value-type="float" office:value="8.3133469976697" calcext:value-type="float">
            <text:p>8.3133</text:p>
          </table:table-cell>
          <table:table-cell table:style-name="ce174" office:value-type="float" office:value="0.9576" calcext:value-type="float">
            <text:p>0.9576</text:p>
          </table:table-cell>
          <table:table-cell table:style-name="ce169" office:value-type="float" office:value="22.5454" calcext:value-type="float">
            <text:p>22.5454</text:p>
          </table:table-cell>
          <table:table-cell table:style-name="ce169"/>
          <table:table-cell table:style-name="ce169" table:formula="of:=[.J7]-[.P7]" office:value-type="float" office:value="0.492000000000001" calcext:value-type="float">
            <text:p>0.4920</text:p>
          </table:table-cell>
          <table:table-cell table:style-name="ce172" table:formula="of:=([.R7]-([.C7]*[.$Q$3]))/([.D7]*[.O7])*100" office:value-type="float" office:value="7.04222494839304" calcext:value-type="float">
            <text:p>7.0422</text:p>
          </table:table-cell>
          <table:table-cell table:style-name="ce172" table:formula="of:=(([.P7]-[.I7])*[.$Q$3])/[.D7]*100" office:value-type="float" office:value="1.30349058084168" calcext:value-type="float">
            <text:p>1.30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2B</text:p>
          </table:table-cell>
          <table:table-cell table:style-name="ce1" office:value-type="float" office:value="7" calcext:value-type="float">
            <text:p>7</text:p>
          </table:table-cell>
          <table:table-cell table:style-name="ce169" office:value-type="float" office:value="0.4264" calcext:value-type="float">
            <text:p>0.4264</text:p>
          </table:table-cell>
          <table:table-cell table:style-name="ce169" office:value-type="float" office:value="1.0002" calcext:value-type="float">
            <text:p>1.0002</text:p>
          </table:table-cell>
          <table:table-cell table:style-name="ce169" office:value-type="float" office:value="0.9793" calcext:value-type="float">
            <text:p>0.9793</text:p>
          </table:table-cell>
          <table:table-cell table:style-name="ce169"/>
          <table:table-cell table:style-name="ce172" table:formula="of:=([.E8]-([.C8]*[.$F$3]))/[.D8]*100" office:value-type="float" office:value="55.3189549795344" calcext:value-type="float">
            <text:p>55.3190</text:p>
          </table:table-cell>
          <table:table-cell table:style-name="ce172" table:formula="of:=([.E8]-([.C8]*[.$F$3]))/([.D8]*[.O8])*100" office:value-type="float" office:value="59.5019414644879" calcext:value-type="float">
            <text:p>59.5019</text:p>
          </table:table-cell>
          <table:table-cell table:style-name="ce169" office:value-type="float" office:value="21.7672" calcext:value-type="float">
            <text:p>21.7672</text:p>
          </table:table-cell>
          <table:table-cell table:style-name="ce169" office:value-type="float" office:value="22.2146" calcext:value-type="float">
            <text:p>22.2146</text:p>
          </table:table-cell>
          <table:table-cell table:style-name="ce169" table:formula="of:=[.J8]-[.I8]" office:value-type="float" office:value="0.447400000000002" calcext:value-type="float">
            <text:p>0.4474</text:p>
          </table:table-cell>
          <table:table-cell table:style-name="ce169"/>
          <table:table-cell table:style-name="ce172" table:formula="of:=([.K8]-([.C8]*[.$L$3]))/[.D8]*100" office:value-type="float" office:value="2.11958546817184" calcext:value-type="float">
            <text:p>2.1196</text:p>
          </table:table-cell>
          <table:table-cell table:style-name="ce172" table:formula="of:=([.K8]-([.C8]*[.$L$3]))/([.D8]*[.O8])*100" office:value-type="float" office:value="2.27985959790453" calcext:value-type="float">
            <text:p>2.2799</text:p>
          </table:table-cell>
          <table:table-cell table:style-name="ce174" office:value-type="float" office:value="0.9297" calcext:value-type="float">
            <text:p>0.9297</text:p>
          </table:table-cell>
          <table:table-cell table:style-name="ce169" office:value-type="float" office:value="21.7767" calcext:value-type="float">
            <text:p>21.7767</text:p>
          </table:table-cell>
          <table:table-cell table:style-name="ce169"/>
          <table:table-cell table:style-name="ce169" table:formula="of:=[.J8]-[.P8]" office:value-type="float" office:value="0.437899999999999" calcext:value-type="float">
            <text:p>0.4379</text:p>
          </table:table-cell>
          <table:table-cell table:style-name="ce172" table:formula="of:=([.R8]-([.C8]*[.$Q$3]))/([.D8]*[.O8])*100" office:value-type="float" office:value="1.35506040553581" calcext:value-type="float">
            <text:p>1.3551</text:p>
          </table:table-cell>
          <table:table-cell table:style-name="ce172" table:formula="of:=(([.P8]-[.I8])*[.$Q$3])/[.D8]*100" office:value-type="float" office:value="0.947358627758524" calcext:value-type="float">
            <text:p>0.94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7B</text:p>
          </table:table-cell>
          <table:table-cell table:style-name="ce1" office:value-type="float" office:value="8" calcext:value-type="float">
            <text:p>8</text:p>
          </table:table-cell>
          <table:table-cell table:style-name="ce169" office:value-type="float" office:value="0.4271" calcext:value-type="float">
            <text:p>0.4271</text:p>
          </table:table-cell>
          <table:table-cell table:style-name="ce169" office:value-type="float" office:value="0.9999" calcext:value-type="float">
            <text:p>0.9999</text:p>
          </table:table-cell>
          <table:table-cell table:style-name="ce169" office:value-type="float" office:value="1.0503" calcext:value-type="float">
            <text:p>1.0503</text:p>
          </table:table-cell>
          <table:table-cell table:style-name="ce169"/>
          <table:table-cell table:style-name="ce172" table:formula="of:=([.E9]-([.C9]*[.$F$3]))/[.D9]*100" office:value-type="float" office:value="62.3663210994962" calcext:value-type="float">
            <text:p>62.3663</text:p>
          </table:table-cell>
          <table:table-cell table:style-name="ce172" table:formula="of:=([.E9]-([.C9]*[.$F$3]))/([.D9]*[.O9])*100" office:value-type="float" office:value="65.6211291030052" calcext:value-type="float">
            <text:p>65.6211</text:p>
          </table:table-cell>
          <table:table-cell table:style-name="ce169" office:value-type="float" office:value="21.3087" calcext:value-type="float">
            <text:p>21.3087</text:p>
          </table:table-cell>
          <table:table-cell table:style-name="ce169" office:value-type="float" office:value="22.2087" calcext:value-type="float">
            <text:p>22.2087</text:p>
          </table:table-cell>
          <table:table-cell table:style-name="ce169" table:formula="of:=[.J9]-[.I9]" office:value-type="float" office:value="0.899999999999999" calcext:value-type="float">
            <text:p>0.9000</text:p>
          </table:table-cell>
          <table:table-cell table:style-name="ce169"/>
          <table:table-cell table:style-name="ce172" table:formula="of:=([.K9]-([.C9]*[.$L$3]))/[.D9]*100" office:value-type="float" office:value="47.3147737110642" calcext:value-type="float">
            <text:p>47.3148</text:p>
          </table:table-cell>
          <table:table-cell table:style-name="ce172" table:formula="of:=([.K9]-([.C9]*[.$L$3]))/([.D9]*[.O9])*100" office:value-type="float" office:value="49.7840632481736" calcext:value-type="float">
            <text:p>49.7841</text:p>
          </table:table-cell>
          <table:table-cell table:style-name="ce174" office:value-type="float" office:value="0.9504" calcext:value-type="float">
            <text:p>0.9504</text:p>
          </table:table-cell>
          <table:table-cell table:style-name="ce169" office:value-type="float" office:value="21.3808" calcext:value-type="float">
            <text:p>21.3808</text:p>
          </table:table-cell>
          <table:table-cell table:style-name="ce169"/>
          <table:table-cell table:style-name="ce169" table:formula="of:=[.J9]-[.P9]" office:value-type="float" office:value="0.8279" calcext:value-type="float">
            <text:p>0.8279</text:p>
          </table:table-cell>
          <table:table-cell table:style-name="ce172" table:formula="of:=([.R9]-([.C9]*[.$Q$3]))/([.D9]*[.O9])*100" office:value-type="float" office:value="42.2919315135557" calcext:value-type="float">
            <text:p>42.2919</text:p>
          </table:table-cell>
          <table:table-cell table:style-name="ce172" table:formula="of:=(([.P9]-[.I9])*[.$Q$3])/[.D9]*100" office:value-type="float" office:value="7.19211057661358" calcext:value-type="float">
            <text:p>7.192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9S</text:p>
          </table:table-cell>
          <table:table-cell table:style-name="ce1" office:value-type="float" office:value="9" calcext:value-type="float">
            <text:p>9</text:p>
          </table:table-cell>
          <table:table-cell table:style-name="ce169" office:value-type="float" office:value="0.4247" calcext:value-type="float">
            <text:p>0.4247</text:p>
          </table:table-cell>
          <table:table-cell table:style-name="ce169" office:value-type="float" office:value="0.9991" calcext:value-type="float">
            <text:p>0.9991</text:p>
          </table:table-cell>
          <table:table-cell table:style-name="ce169" office:value-type="float" office:value="1.3285" calcext:value-type="float">
            <text:p>1.3285</text:p>
          </table:table-cell>
          <table:table-cell table:style-name="ce169"/>
          <table:table-cell table:style-name="ce172" table:formula="of:=([.E10]-([.C10]*[.$F$3]))/[.D10]*100" office:value-type="float" office:value="90.5013104003834" calcext:value-type="float">
            <text:p>90.5013</text:p>
          </table:table-cell>
          <table:table-cell table:style-name="ce172" table:formula="of:=([.E10]-([.C10]*[.$F$3]))/([.D10]*[.O10])*100" office:value-type="float" office:value="93.4448223029255" calcext:value-type="float">
            <text:p>93.4448</text:p>
          </table:table-cell>
          <table:table-cell table:style-name="ce169" office:value-type="float" office:value="21.8836" calcext:value-type="float">
            <text:p>21.8836</text:p>
          </table:table-cell>
          <table:table-cell table:style-name="ce169" office:value-type="float" office:value="23.0973" calcext:value-type="float">
            <text:p>23.0973</text:p>
          </table:table-cell>
          <table:table-cell table:style-name="ce169" table:formula="of:=[.J10]-[.I10]" office:value-type="float" office:value="1.2137" calcext:value-type="float">
            <text:p>1.2137</text:p>
          </table:table-cell>
          <table:table-cell table:style-name="ce169"/>
          <table:table-cell table:style-name="ce172" table:formula="of:=([.K10]-([.C10]*[.$L$3]))/[.D10]*100" office:value-type="float" office:value="78.9910215298885" calcext:value-type="float">
            <text:p>78.9910</text:p>
          </table:table-cell>
          <table:table-cell table:style-name="ce172" table:formula="of:=([.K10]-([.C10]*[.$L$3]))/([.D10]*[.O10])*100" office:value-type="float" office:value="81.560166783571" calcext:value-type="float">
            <text:p>81.5602</text:p>
          </table:table-cell>
          <table:table-cell table:style-name="ce174" office:value-type="float" office:value="0.9685" calcext:value-type="float">
            <text:p>0.9685</text:p>
          </table:table-cell>
          <table:table-cell table:style-name="ce169" office:value-type="float" office:value="22.0735" calcext:value-type="float">
            <text:p>22.0735</text:p>
          </table:table-cell>
          <table:table-cell table:style-name="ce169"/>
          <table:table-cell table:style-name="ce169" table:formula="of:=[.J10]-[.P10]" office:value-type="float" office:value="1.0238" calcext:value-type="float">
            <text:p>1.0238</text:p>
          </table:table-cell>
          <table:table-cell table:style-name="ce172" table:formula="of:=([.R10]-([.C10]*[.$Q$3]))/([.D10]*[.O10])*100" office:value-type="float" office:value="62.0275468962993" calcext:value-type="float">
            <text:p>62.0275</text:p>
          </table:table-cell>
          <table:table-cell table:style-name="ce172" table:formula="of:=(([.P10]-[.I10])*[.$Q$3])/[.D10]*100" office:value-type="float" office:value="18.9580500441948" calcext:value-type="float">
            <text:p>18.958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6</text:p>
          </table:table-cell>
          <table:table-cell table:style-name="ce1" office:value-type="float" office:value="10" calcext:value-type="float">
            <text:p>10</text:p>
          </table:table-cell>
          <table:table-cell table:style-name="ce169" office:value-type="float" office:value="0.4254" calcext:value-type="float">
            <text:p>0.4254</text:p>
          </table:table-cell>
          <table:table-cell table:style-name="ce169" office:value-type="float" office:value="1.0041" calcext:value-type="float">
            <text:p>1.0041</text:p>
          </table:table-cell>
          <table:table-cell table:style-name="ce169" office:value-type="float" office:value="1.1554" calcext:value-type="float">
            <text:p>1.1554</text:p>
          </table:table-cell>
          <table:table-cell table:style-name="ce169"/>
          <table:table-cell table:style-name="ce172" table:formula="of:=([.E11]-([.C11]*[.$F$3]))/[.D11]*100" office:value-type="float" office:value="72.7416840134239" calcext:value-type="float">
            <text:p>72.7417</text:p>
          </table:table-cell>
          <table:table-cell table:style-name="ce172" table:formula="of:=([.E11]-([.C11]*[.$F$3]))/([.D11]*[.O11])*100" office:value-type="float" office:value="75.5914829194886" calcext:value-type="float">
            <text:p>75.5915</text:p>
          </table:table-cell>
          <table:table-cell table:style-name="ce169" office:value-type="float" office:value="21.9316" calcext:value-type="float">
            <text:p>21.9316</text:p>
          </table:table-cell>
          <table:table-cell table:style-name="ce169" office:value-type="float" office:value="22.6008" calcext:value-type="float">
            <text:p>22.6008</text:p>
          </table:table-cell>
          <table:table-cell table:style-name="ce169" table:formula="of:=[.J11]-[.I11]" office:value-type="float" office:value="0.6692" calcext:value-type="float">
            <text:p>0.6692</text:p>
          </table:table-cell>
          <table:table-cell table:style-name="ce169"/>
          <table:table-cell table:style-name="ce172" table:formula="of:=([.K11]-([.C11]*[.$L$3]))/[.D11]*100" office:value-type="float" office:value="24.3003311014238" calcext:value-type="float">
            <text:p>24.3003</text:p>
          </table:table-cell>
          <table:table-cell table:style-name="ce172" table:formula="of:=([.K11]-([.C11]*[.$L$3]))/([.D11]*[.O11])*100" office:value-type="float" office:value="25.2523444886457" calcext:value-type="float">
            <text:p>25.2523</text:p>
          </table:table-cell>
          <table:table-cell table:style-name="ce174" office:value-type="float" office:value="0.9623" calcext:value-type="float">
            <text:p>0.9623</text:p>
          </table:table-cell>
          <table:table-cell table:style-name="ce169" office:value-type="float" office:value="21.9388" calcext:value-type="float">
            <text:p>21.9388</text:p>
          </table:table-cell>
          <table:table-cell table:style-name="ce169"/>
          <table:table-cell table:style-name="ce169" table:formula="of:=[.J11]-[.P11]" office:value-type="float" office:value="0.661999999999999" calcext:value-type="float">
            <text:p>0.6620</text:p>
          </table:table-cell>
          <table:table-cell table:style-name="ce172" table:formula="of:=([.R11]-([.C11]*[.$Q$3]))/([.D11]*[.O11])*100" office:value-type="float" office:value="24.6001613939507" calcext:value-type="float">
            <text:p>24.6002</text:p>
          </table:table-cell>
          <table:table-cell table:style-name="ce172" table:formula="of:=(([.P11]-[.I11])*[.$Q$3])/[.D11]*100" office:value-type="float" office:value="0.715209359131175" calcext:value-type="float">
            <text:p>0.715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8S</text:p>
          </table:table-cell>
          <table:table-cell table:style-name="ce1" office:value-type="float" office:value="11" calcext:value-type="float">
            <text:p>11</text:p>
          </table:table-cell>
          <table:table-cell table:style-name="ce169" office:value-type="float" office:value="0.4241" calcext:value-type="float">
            <text:p>0.4241</text:p>
          </table:table-cell>
          <table:table-cell table:style-name="ce169" office:value-type="float" office:value="1.0004" calcext:value-type="float">
            <text:p>1.0004</text:p>
          </table:table-cell>
          <table:table-cell table:style-name="ce169" office:value-type="float" office:value="1.2664" calcext:value-type="float">
            <text:p>1.2664</text:p>
          </table:table-cell>
          <table:table-cell table:style-name="ce169"/>
          <table:table-cell table:style-name="ce172" table:formula="of:=([.E12]-([.C12]*[.$F$3]))/[.D12]*100" office:value-type="float" office:value="84.2361084660458" calcext:value-type="float">
            <text:p>84.2361</text:p>
          </table:table-cell>
          <table:table-cell table:style-name="ce172" table:formula="of:=([.E12]-([.C12]*[.$F$3]))/([.D12]*[.O12])*100" office:value-type="float" office:value="87.327502038198" calcext:value-type="float">
            <text:p>87.3275</text:p>
          </table:table-cell>
          <table:table-cell table:style-name="ce169" office:value-type="float" office:value="21.9134" calcext:value-type="float">
            <text:p>21.9134</text:p>
          </table:table-cell>
          <table:table-cell table:style-name="ce169" office:value-type="float" office:value="23.0451" calcext:value-type="float">
            <text:p>23.0451</text:p>
          </table:table-cell>
          <table:table-cell table:style-name="ce169" table:formula="of:=[.J12]-[.I12]" office:value-type="float" office:value="1.1317" calcext:value-type="float">
            <text:p>1.1317</text:p>
          </table:table-cell>
          <table:table-cell table:style-name="ce169"/>
          <table:table-cell table:style-name="ce172" table:formula="of:=([.K12]-([.C12]*[.$L$3]))/[.D12]*100" office:value-type="float" office:value="70.7516008143907" calcext:value-type="float">
            <text:p>70.7516</text:p>
          </table:table-cell>
          <table:table-cell table:style-name="ce172" table:formula="of:=([.K12]-([.C12]*[.$L$3]))/([.D12]*[.O12])*100" office:value-type="float" office:value="73.3481244188168" calcext:value-type="float">
            <text:p>73.3481</text:p>
          </table:table-cell>
          <table:table-cell table:style-name="ce174" office:value-type="float" office:value="0.9646" calcext:value-type="float">
            <text:p>0.9646</text:p>
          </table:table-cell>
          <table:table-cell table:style-name="ce169" office:value-type="float" office:value="22.1792" calcext:value-type="float">
            <text:p>22.1792</text:p>
          </table:table-cell>
          <table:table-cell table:style-name="ce169"/>
          <table:table-cell table:style-name="ce169" table:formula="of:=[.J12]-[.P12]" office:value-type="float" office:value="0.8659" calcext:value-type="float">
            <text:p>0.8659</text:p>
          </table:table-cell>
          <table:table-cell table:style-name="ce172" table:formula="of:=([.R12]-([.C12]*[.$Q$3]))/([.D12]*[.O12])*100" office:value-type="float" office:value="45.8964848654555" calcext:value-type="float">
            <text:p>45.8965</text:p>
          </table:table-cell>
          <table:table-cell table:style-name="ce172" table:formula="of:=(([.P12]-[.I12])*[.$Q$3])/[.D12]*100" office:value-type="float" office:value="26.5007980852709" calcext:value-type="float">
            <text:p>26.500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1</text:p>
          </table:table-cell>
          <table:table-cell table:style-name="ce1" office:value-type="float" office:value="12" calcext:value-type="float">
            <text:p>12</text:p>
          </table:table-cell>
          <table:table-cell table:style-name="ce169" office:value-type="float" office:value="0.425" calcext:value-type="float">
            <text:p>0.4250</text:p>
          </table:table-cell>
          <table:table-cell table:style-name="ce169" office:value-type="float" office:value="1.0007" calcext:value-type="float">
            <text:p>1.0007</text:p>
          </table:table-cell>
          <table:table-cell table:style-name="ce169" office:value-type="float" office:value="1.16" calcext:value-type="float">
            <text:p>1.1600</text:p>
          </table:table-cell>
          <table:table-cell table:style-name="ce169"/>
          <table:table-cell table:style-name="ce172" table:formula="of:=([.E13]-([.C13]*[.$F$3]))/[.D13]*100" office:value-type="float" office:value="73.4884454649929" calcext:value-type="float">
            <text:p>73.4884</text:p>
          </table:table-cell>
          <table:table-cell table:style-name="ce172" table:formula="of:=([.E13]-([.C13]*[.$F$3]))/([.D13]*[.O13])*100" office:value-type="float" office:value="76.9351397246576" calcext:value-type="float">
            <text:p>76.9351</text:p>
          </table:table-cell>
          <table:table-cell table:style-name="ce169" office:value-type="float" office:value="20.8396" calcext:value-type="float">
            <text:p>20.8396</text:p>
          </table:table-cell>
          <table:table-cell table:style-name="ce169" office:value-type="float" office:value="21.3695" calcext:value-type="float">
            <text:p>21.3695</text:p>
          </table:table-cell>
          <table:table-cell table:style-name="ce169" table:formula="of:=[.J13]-[.I13]" office:value-type="float" office:value="0.529899999999998" calcext:value-type="float">
            <text:p>0.5299</text:p>
          </table:table-cell>
          <table:table-cell table:style-name="ce169"/>
          <table:table-cell table:style-name="ce172" table:formula="of:=([.K13]-([.C13]*[.$L$3]))/[.D13]*100" office:value-type="float" office:value="10.5025918740973" calcext:value-type="float">
            <text:p>10.5026</text:p>
          </table:table-cell>
          <table:table-cell table:style-name="ce172" table:formula="of:=([.K13]-([.C13]*[.$L$3]))/([.D13]*[.O13])*100" office:value-type="float" office:value="10.9951757475893" calcext:value-type="float">
            <text:p>10.9952</text:p>
          </table:table-cell>
          <table:table-cell table:style-name="ce174" office:value-type="float" office:value="0.9552" calcext:value-type="float">
            <text:p>0.9552</text:p>
          </table:table-cell>
          <table:table-cell table:style-name="ce169" office:value-type="float" office:value="20.8648" calcext:value-type="float">
            <text:p>20.8648</text:p>
          </table:table-cell>
          <table:table-cell table:style-name="ce169"/>
          <table:table-cell table:style-name="ce169" table:formula="of:=[.J13]-[.P13]" office:value-type="float" office:value="0.5047" calcext:value-type="float">
            <text:p>0.5047</text:p>
          </table:table-cell>
          <table:table-cell table:style-name="ce172" table:formula="of:=([.R13]-([.C13]*[.$Q$3]))/([.D13]*[.O13])*100" office:value-type="float" office:value="8.45272033011865" calcext:value-type="float">
            <text:p>8.4527</text:p>
          </table:table-cell>
          <table:table-cell table:style-name="ce172" table:formula="of:=(([.P13]-[.I13])*[.$Q$3])/[.D13]*100" office:value-type="float" office:value="2.51173779480575" calcext:value-type="float">
            <text:p>2.5117</text:p>
          </table:table-cell>
          <table:table-cell table:number-columns-repeated="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 calcext:value-type="string">
            <text:p>Blank</text:p>
          </table:table-cell>
          <table:table-cell table:style-name="ce1" office:value-type="float" office:value="1" calcext:value-type="float">
            <text:p>1</text:p>
          </table:table-cell>
          <table:table-cell table:style-name="ce169" office:value-type="float" office:value="0.4283" calcext:value-type="float">
            <text:p>0.4283</text:p>
          </table:table-cell>
          <table:table-cell table:style-name="ce169" office:value-type="float" office:value="0" calcext:value-type="float">
            <text:p>0.0000</text:p>
          </table:table-cell>
          <table:table-cell table:style-name="ce169" office:value-type="float" office:value="0.4271" calcext:value-type="float">
            <text:p>0.4271</text:p>
          </table:table-cell>
          <table:table-cell table:style-name="ce170" table:formula="of:=[.E16]/[.C16]" office:value-type="float" office:value="0.997198225542844" calcext:value-type="float">
            <text:p>0.9972</text:p>
          </table:table-cell>
          <table:table-cell table:style-name="ce172" table:number-columns-repeated="2"/>
          <table:table-cell table:style-name="ce169" office:value-type="float" office:value="20.4677" calcext:value-type="float">
            <text:p>20.4677</text:p>
          </table:table-cell>
          <table:table-cell table:style-name="ce169" office:value-type="float" office:value="20.8939" calcext:value-type="float">
            <text:p>20.8939</text:p>
          </table:table-cell>
          <table:table-cell table:style-name="ce169" table:formula="of:=[.J16]-[.I16]" office:value-type="float" office:value="0.426199999999998" calcext:value-type="float">
            <text:p>0.4262</text:p>
          </table:table-cell>
          <table:table-cell table:style-name="ce170" table:formula="of:=[.K16]/[.C16]" office:value-type="float" office:value="0.995096894699972" calcext:value-type="float">
            <text:p>0.9951</text:p>
          </table:table-cell>
          <table:table-cell table:style-name="ce172" table:number-columns-repeated="2"/>
          <table:table-cell table:style-name="ce174"/>
          <table:table-cell table:style-name="ce169" office:value-type="float" office:value="20.4951" calcext:value-type="float">
            <text:p>20.4951</text:p>
          </table:table-cell>
          <table:table-cell table:style-name="ce170" table:formula="of:=[.R16]/[.C16]" office:value-type="float" office:value="0.931123044594905" calcext:value-type="float">
            <text:p>0.9311</text:p>
          </table:table-cell>
          <table:table-cell table:style-name="ce169" table:formula="of:=[.J16]-[.P16]" office:value-type="float" office:value="0.398799999999998" calcext:value-type="float">
            <text:p>0.3988</text:p>
          </table:table-cell>
          <table:table-cell table:style-name="ce17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IK 5S</text:p>
          </table:table-cell>
          <table:table-cell table:style-name="ce1" office:value-type="float" office:value="2" calcext:value-type="float">
            <text:p>2</text:p>
          </table:table-cell>
          <table:table-cell table:style-name="ce169" office:value-type="float" office:value="0.4259" calcext:value-type="float">
            <text:p>0.4259</text:p>
          </table:table-cell>
          <table:table-cell table:style-name="ce169" office:value-type="float" office:value="1.0026" calcext:value-type="float">
            <text:p>1.0026</text:p>
          </table:table-cell>
          <table:table-cell table:style-name="ce169" office:value-type="float" office:value="1.1563" calcext:value-type="float">
            <text:p>1.1563</text:p>
          </table:table-cell>
          <table:table-cell table:style-name="ce169"/>
          <table:table-cell table:style-name="ce172" table:formula="of:=([.E17]-([.C17]*[.$F$16]))/[.D17]*100" office:value-type="float" office:value="72.9696065969782" calcext:value-type="float">
            <text:p>72.9696</text:p>
          </table:table-cell>
          <table:table-cell table:style-name="ce172" table:formula="of:=([.E17]-([.C17]*[.$F$16]))/([.D17]*[.O17])*100" office:value-type="float" office:value="74.367719727862" calcext:value-type="float">
            <text:p>74.3677</text:p>
          </table:table-cell>
          <table:table-cell table:style-name="ce169" office:value-type="float" office:value="22.0926" calcext:value-type="float">
            <text:p>22.0926</text:p>
          </table:table-cell>
          <table:table-cell table:style-name="ce169" office:value-type="float" office:value="22.6873" calcext:value-type="float">
            <text:p>22.6873</text:p>
          </table:table-cell>
          <table:table-cell table:style-name="ce169" table:formula="of:=[.J17]-[.I17]" office:value-type="float" office:value="0.5947" calcext:value-type="float">
            <text:p>0.5947</text:p>
          </table:table-cell>
          <table:table-cell table:style-name="ce169"/>
          <table:table-cell table:style-name="ce172" table:formula="of:=(([.K17]-([.C17]*[.$L$16]))/[.D17])*100" office:value-type="float" office:value="17.0445075351368" calcext:value-type="float">
            <text:p>17.0445</text:p>
          </table:table-cell>
          <table:table-cell table:style-name="ce172" table:formula="of:=([.K17]-([.C17]*[.$L$16]))/([.D17]*[.O17])*100" office:value-type="float" office:value="17.3710839126955" calcext:value-type="float">
            <text:p>17.3711</text:p>
          </table:table-cell>
          <table:table-cell table:style-name="ce174" office:value-type="float" office:value="0.9812" calcext:value-type="float">
            <text:p>0.9812</text:p>
          </table:table-cell>
          <table:table-cell table:style-name="ce169" office:value-type="float" office:value="22.0984" calcext:value-type="float">
            <text:p>22.0984</text:p>
          </table:table-cell>
          <table:table-cell table:style-name="ce169"/>
          <table:table-cell table:style-name="ce169" table:formula="of:=[.J17]-[.P17]" office:value-type="float" office:value="0.588899999999999" calcext:value-type="float">
            <text:p>0.5889</text:p>
          </table:table-cell>
          <table:table-cell table:style-name="ce172" table:formula="of:=([.R17]-([.C17]*[.$Q$16]))/([.D17]*[.O17])*100" office:value-type="float" office:value="19.551153884026" calcext:value-type="float">
            <text:p>19.5512</text:p>
          </table:table-cell>
          <table:table-cell table:style-name="ce172" table:formula="of:=(([.P17]-[.I17])*[.$Q$16])/[.D17]*100" office:value-type="float" office:value="0.538650873593766" calcext:value-type="float">
            <text:p>0.538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4B</text:p>
          </table:table-cell>
          <table:table-cell table:style-name="ce1" office:value-type="float" office:value="4" calcext:value-type="float">
            <text:p>4</text:p>
          </table:table-cell>
          <table:table-cell table:style-name="ce169" office:value-type="float" office:value="0.4268" calcext:value-type="float">
            <text:p>0.4268</text:p>
          </table:table-cell>
          <table:table-cell table:style-name="ce169" office:value-type="float" office:value="1.0045" calcext:value-type="float">
            <text:p>1.0045</text:p>
          </table:table-cell>
          <table:table-cell table:style-name="ce169" office:value-type="float" office:value="1.0466" calcext:value-type="float">
            <text:p>1.0466</text:p>
          </table:table-cell>
          <table:table-cell table:style-name="ce169"/>
          <table:table-cell table:style-name="ce172" table:formula="of:=([.E18]-([.C18]*[.$F$16]))/[.D18]*100" office:value-type="float" office:value="61.8213835080452" calcext:value-type="float">
            <text:p>61.8214</text:p>
          </table:table-cell>
          <table:table-cell table:style-name="ce172" table:formula="of:=([.E18]-([.C18]*[.$F$16]))/([.D18]*[.O18])*100" office:value-type="float" office:value="63.9311101427562" calcext:value-type="float">
            <text:p>63.9311</text:p>
          </table:table-cell>
          <table:table-cell table:style-name="ce169" office:value-type="float" office:value="22.191" calcext:value-type="float">
            <text:p>22.1910</text:p>
          </table:table-cell>
          <table:table-cell table:style-name="ce169" office:value-type="float" office:value="22.6208" calcext:value-type="float">
            <text:p>22.6208</text:p>
          </table:table-cell>
          <table:table-cell table:style-name="ce169" table:formula="of:=[.J18]-[.I18]" office:value-type="float" office:value="0.4298" calcext:value-type="float">
            <text:p>0.4298</text:p>
          </table:table-cell>
          <table:table-cell table:style-name="ce169"/>
          <table:table-cell table:style-name="ce172" table:formula="of:=(([.K18]-([.C18]*[.$L$16]))/[.D18])*100" office:value-type="float" office:value="0.506983110209281" calcext:value-type="float">
            <text:p>0.5070</text:p>
          </table:table-cell>
          <table:table-cell table:style-name="ce172" table:formula="of:=([.K18]-([.C18]*[.$L$16]))/([.D18]*[.O18])*100" office:value-type="float" office:value="0.524284498665234" calcext:value-type="float">
            <text:p>0.5243</text:p>
          </table:table-cell>
          <table:table-cell table:style-name="ce174" office:value-type="float" office:value="0.967" calcext:value-type="float">
            <text:p>0.9670</text:p>
          </table:table-cell>
          <table:table-cell table:style-name="ce169" office:value-type="float" office:value="22.1919" calcext:value-type="float">
            <text:p>22.1919</text:p>
          </table:table-cell>
          <table:table-cell table:style-name="ce169"/>
          <table:table-cell table:style-name="ce169" table:formula="of:=[.J18]-[.P18]" office:value-type="float" office:value="0.428899999999999" calcext:value-type="float">
            <text:p>0.4289</text:p>
          </table:table-cell>
          <table:table-cell table:style-name="ce172" table:formula="of:=([.R18]-([.C18]*[.$Q$16]))/([.D18]*[.O18])*100" office:value-type="float" office:value="3.24256302346712" calcext:value-type="float">
            <text:p>3.2426</text:p>
          </table:table-cell>
          <table:table-cell table:style-name="ce172" table:formula="of:=(([.P18]-[.I18])*[.$Q$16])/[.D18]*100" office:value-type="float" office:value="0.0834256585502011" calcext:value-type="float">
            <text:p>0.083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1B</text:p>
          </table:table-cell>
          <table:table-cell table:style-name="ce1" office:value-type="float" office:value="5" calcext:value-type="float">
            <text:p>5</text:p>
          </table:table-cell>
          <table:table-cell table:style-name="ce169" office:value-type="float" office:value="0.4253" calcext:value-type="float">
            <text:p>0.4253</text:p>
          </table:table-cell>
          <table:table-cell table:style-name="ce169" office:value-type="float" office:value="1.0051" calcext:value-type="float">
            <text:p>1.0051</text:p>
          </table:table-cell>
          <table:table-cell table:style-name="ce169" office:value-type="float" office:value="1.0217" calcext:value-type="float">
            <text:p>1.0217</text:p>
          </table:table-cell>
          <table:table-cell table:style-name="ce169"/>
          <table:table-cell table:style-name="ce172" table:formula="of:=([.E19]-([.C19]*[.$F$16]))/[.D19]*100" office:value-type="float" office:value="59.4559342032264" calcext:value-type="float">
            <text:p>59.4559</text:p>
          </table:table-cell>
          <table:table-cell table:style-name="ce172" table:formula="of:=([.E19]-([.C19]*[.$F$16]))/([.D19]*[.O19])*100" office:value-type="float" office:value="62.1274129605292" calcext:value-type="float">
            <text:p>62.1274</text:p>
          </table:table-cell>
          <table:table-cell table:style-name="ce169" office:value-type="float" office:value="21.161" calcext:value-type="float">
            <text:p>21.1610</text:p>
          </table:table-cell>
          <table:table-cell table:style-name="ce169" office:value-type="float" office:value="21.5873" calcext:value-type="float">
            <text:p>21.5873</text:p>
          </table:table-cell>
          <table:table-cell table:style-name="ce169" table:formula="of:=[.J19]-[.I19]" office:value-type="float" office:value="0.426299999999998" calcext:value-type="float">
            <text:p>0.4263</text:p>
          </table:table-cell>
          <table:table-cell table:style-name="ce169"/>
          <table:table-cell table:style-name="ce172" table:formula="of:=(([.K19]-([.C19]*[.$L$16]))/[.D19])*100" office:value-type="float" office:value="0.306963554283124" calcext:value-type="float">
            <text:p>0.3070</text:p>
          </table:table-cell>
          <table:table-cell table:style-name="ce172" table:formula="of:=([.K19]-([.C19]*[.$L$16]))/([.D19]*[.O19])*100" office:value-type="float" office:value="0.320756065081635" calcext:value-type="float">
            <text:p>0.3208</text:p>
          </table:table-cell>
          <table:table-cell table:style-name="ce174" office:value-type="float" office:value="0.957" calcext:value-type="float">
            <text:p>0.9570</text:p>
          </table:table-cell>
          <table:table-cell table:style-name="ce169" office:value-type="float" office:value="21.1664" calcext:value-type="float">
            <text:p>21.1664</text:p>
          </table:table-cell>
          <table:table-cell table:style-name="ce169"/>
          <table:table-cell table:style-name="ce169" table:formula="of:=[.J19]-[.P19]" office:value-type="float" office:value="0.4209" calcext:value-type="float">
            <text:p>0.4209</text:p>
          </table:table-cell>
          <table:table-cell table:style-name="ce172" table:formula="of:=([.R19]-([.C19]*[.$Q$16]))/([.D19]*[.O19])*100" office:value-type="float" office:value="2.58798925207528" calcext:value-type="float">
            <text:p>2.5880</text:p>
          </table:table-cell>
          <table:table-cell table:style-name="ce172" table:formula="of:=(([.P19]-[.I19])*[.$Q$16])/[.D19]*100" office:value-type="float" office:value="0.500255142852521" calcext:value-type="float">
            <text:p>0.500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1S</text:p>
          </table:table-cell>
          <table:table-cell table:style-name="ce1" office:value-type="float" office:value="6" calcext:value-type="float">
            <text:p>6</text:p>
          </table:table-cell>
          <table:table-cell table:style-name="ce169" office:value-type="float" office:value="0.426" calcext:value-type="float">
            <text:p>0.4260</text:p>
          </table:table-cell>
          <table:table-cell table:style-name="ce169" office:value-type="float" office:value="1.0029" calcext:value-type="float">
            <text:p>1.0029</text:p>
          </table:table-cell>
          <table:table-cell table:style-name="ce169" office:value-type="float" office:value="1.2696" calcext:value-type="float">
            <text:p>1.2696</text:p>
          </table:table-cell>
          <table:table-cell table:style-name="ce169"/>
          <table:table-cell table:style-name="ce172" table:formula="of:=([.E20]-([.C20]*[.$F$16]))/[.D20]*100" office:value-type="float" office:value="84.2350738776297" calcext:value-type="float">
            <text:p>84.2351</text:p>
          </table:table-cell>
          <table:table-cell table:style-name="ce172" table:formula="of:=([.E20]-([.C20]*[.$F$16]))/([.D20]*[.O20])*100" office:value-type="float" office:value="86.5725322483348" calcext:value-type="float">
            <text:p>86.5725</text:p>
          </table:table-cell>
          <table:table-cell table:style-name="ce169" office:value-type="float" office:value="22.532" calcext:value-type="float">
            <text:p>22.5320</text:p>
          </table:table-cell>
          <table:table-cell table:style-name="ce169" office:value-type="float" office:value="22.9585" calcext:value-type="float">
            <text:p>22.9585</text:p>
          </table:table-cell>
          <table:table-cell table:style-name="ce169" table:formula="of:=[.J20]-[.I20]" office:value-type="float" office:value="0.426500000000001" calcext:value-type="float">
            <text:p>0.4265</text:p>
          </table:table-cell>
          <table:table-cell table:style-name="ce169"/>
          <table:table-cell table:style-name="ce172" table:formula="of:=(([.K20]-([.C20]*[.$L$16]))/[.D20])*100" office:value-type="float" office:value="0.258123726973059" calcext:value-type="float">
            <text:p>0.2581</text:p>
          </table:table-cell>
          <table:table-cell table:style-name="ce172" table:formula="of:=([.K20]-([.C20]*[.$L$16]))/([.D20]*[.O20])*100" office:value-type="float" office:value="0.265286461431715" calcext:value-type="float">
            <text:p>0.2653</text:p>
          </table:table-cell>
          <table:table-cell table:style-name="ce174" office:value-type="float" office:value="0.973" calcext:value-type="float">
            <text:p>0.9730</text:p>
          </table:table-cell>
          <table:table-cell table:style-name="ce169" office:value-type="float" office:value="22.5339" calcext:value-type="float">
            <text:p>22.5339</text:p>
          </table:table-cell>
          <table:table-cell table:style-name="ce169"/>
          <table:table-cell table:style-name="ce169" table:formula="of:=[.J20]-[.P20]" office:value-type="float" office:value="0.424600000000002" calcext:value-type="float">
            <text:p>0.4246</text:p>
          </table:table-cell>
          <table:table-cell table:style-name="ce172" table:formula="of:=([.R20]-([.C20]*[.$Q$16]))/([.D20]*[.O20])*100" office:value-type="float" office:value="2.86339020771644" calcext:value-type="float">
            <text:p>2.8634</text:p>
          </table:table-cell>
          <table:table-cell table:style-name="ce172" table:formula="of:=(([.P20]-[.I20])*[.$Q$16])/[.D20]*100" office:value-type="float" office:value="0.176401813214628" calcext:value-type="float">
            <text:p>0.176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6S</text:p>
          </table:table-cell>
          <table:table-cell table:style-name="ce1" office:value-type="float" office:value="7" calcext:value-type="float">
            <text:p>7</text:p>
          </table:table-cell>
          <table:table-cell table:style-name="ce169" office:value-type="float" office:value="0.4303" calcext:value-type="float">
            <text:p>0.4303</text:p>
          </table:table-cell>
          <table:table-cell table:style-name="ce169" office:value-type="float" office:value="0.9985" calcext:value-type="float">
            <text:p>0.9985</text:p>
          </table:table-cell>
          <table:table-cell table:style-name="ce169" office:value-type="float" office:value="1.152" calcext:value-type="float">
            <text:p>1.1520</text:p>
          </table:table-cell>
          <table:table-cell table:style-name="ce169"/>
          <table:table-cell table:style-name="ce172" table:formula="of:=([.E21]-([.C21]*[.$F$16]))/[.D21]*100" office:value-type="float" office:value="72.3991590935317" calcext:value-type="float">
            <text:p>72.3992</text:p>
          </table:table-cell>
          <table:table-cell table:style-name="ce172" table:formula="of:=([.E21]-([.C21]*[.$F$16]))/([.D21]*[.O21])*100" office:value-type="float" office:value="73.8089092604055" calcext:value-type="float">
            <text:p>73.8089</text:p>
          </table:table-cell>
          <table:table-cell table:style-name="ce169" office:value-type="float" office:value="21.7669" calcext:value-type="float">
            <text:p>21.7669</text:p>
          </table:table-cell>
          <table:table-cell table:style-name="ce169" office:value-type="float" office:value="22.4106" calcext:value-type="float">
            <text:p>22.4106</text:p>
          </table:table-cell>
          <table:table-cell table:style-name="ce169" table:formula="of:=[.J21]-[.I21]" office:value-type="float" office:value="0.643699999999999" calcext:value-type="float">
            <text:p>0.6437</text:p>
          </table:table-cell>
          <table:table-cell table:style-name="ce169"/>
          <table:table-cell table:style-name="ce172" table:formula="of:=(([.K21]-([.C21]*[.$L$16]))/[.D21])*100" office:value-type="float" office:value="21.5833556545419" calcext:value-type="float">
            <text:p>21.5834</text:p>
          </table:table-cell>
          <table:table-cell table:style-name="ce172" table:formula="of:=([.K21]-([.C21]*[.$L$16]))/([.D21]*[.O21])*100" office:value-type="float" office:value="22.0036248899398" calcext:value-type="float">
            <text:p>22.0036</text:p>
          </table:table-cell>
          <table:table-cell table:style-name="ce174" office:value-type="float" office:value="0.9809" calcext:value-type="float">
            <text:p>0.9809</text:p>
          </table:table-cell>
          <table:table-cell table:style-name="ce169" office:value-type="float" office:value="21.7732" calcext:value-type="float">
            <text:p>21.7732</text:p>
          </table:table-cell>
          <table:table-cell table:style-name="ce169"/>
          <table:table-cell table:style-name="ce169" table:formula="of:=[.J21]-[.P21]" office:value-type="float" office:value="0.6374" calcext:value-type="float">
            <text:p>0.6374</text:p>
          </table:table-cell>
          <table:table-cell table:style-name="ce172" table:formula="of:=([.R21]-([.C21]*[.$Q$16]))/([.D21]*[.O21])*100" office:value-type="float" office:value="24.1710056072805" calcext:value-type="float">
            <text:p>24.1710</text:p>
          </table:table-cell>
          <table:table-cell table:style-name="ce172" table:formula="of:=(([.P21]-[.I21])*[.$Q$16])/[.D21]*100" office:value-type="float" office:value="0.587488751221579" calcext:value-type="float">
            <text:p>0.587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2S</text:p>
          </table:table-cell>
          <table:table-cell table:style-name="ce1" office:value-type="float" office:value="8" calcext:value-type="float">
            <text:p>8</text:p>
          </table:table-cell>
          <table:table-cell table:style-name="ce169" office:value-type="float" office:value="0.426" calcext:value-type="float">
            <text:p>0.4260</text:p>
          </table:table-cell>
          <table:table-cell table:style-name="ce169" office:value-type="float" office:value="0.9976" calcext:value-type="float">
            <text:p>0.9976</text:p>
          </table:table-cell>
          <table:table-cell table:style-name="ce169" office:value-type="float" office:value="1.2181" calcext:value-type="float">
            <text:p>1.2181</text:p>
          </table:table-cell>
          <table:table-cell table:style-name="ce169"/>
          <table:table-cell table:style-name="ce172" table:formula="of:=([.E22]-([.C22]*[.$F$16]))/[.D22]*100" office:value-type="float" office:value="79.5202040816709" calcext:value-type="float">
            <text:p>79.5202</text:p>
          </table:table-cell>
          <table:table-cell table:style-name="ce172" table:formula="of:=([.E22]-([.C22]*[.$F$16]))/([.D22]*[.O22])*100" office:value-type="float" office:value="81.5173798889501" calcext:value-type="float">
            <text:p>81.5174</text:p>
          </table:table-cell>
          <table:table-cell table:style-name="ce169" office:value-type="float" office:value="21.3083" calcext:value-type="float">
            <text:p>21.3083</text:p>
          </table:table-cell>
          <table:table-cell table:style-name="ce169" office:value-type="float" office:value="21.74" calcext:value-type="float">
            <text:p>21.7400</text:p>
          </table:table-cell>
          <table:table-cell table:style-name="ce169" table:formula="of:=[.J22]-[.I22]" office:value-type="float" office:value="0.431699999999999" calcext:value-type="float">
            <text:p>0.4317</text:p>
          </table:table-cell>
          <table:table-cell table:style-name="ce169"/>
          <table:table-cell table:style-name="ce172" table:formula="of:=(([.K22]-([.C22]*[.$L$16]))/[.D22])*100" office:value-type="float" office:value="0.780746076364409" calcext:value-type="float">
            <text:p>0.7807</text:p>
          </table:table-cell>
          <table:table-cell table:style-name="ce172" table:formula="of:=([.K22]-([.C22]*[.$L$16]))/([.D22]*[.O22])*100" office:value-type="float" office:value="0.80035476818494" calcext:value-type="float">
            <text:p>0.8004</text:p>
          </table:table-cell>
          <table:table-cell table:style-name="ce174" office:value-type="float" office:value="0.9755" calcext:value-type="float">
            <text:p>0.9755</text:p>
          </table:table-cell>
          <table:table-cell table:style-name="ce169" office:value-type="float" office:value="21.3113" calcext:value-type="float">
            <text:p>21.3113</text:p>
          </table:table-cell>
          <table:table-cell table:style-name="ce169"/>
          <table:table-cell table:style-name="ce169" table:formula="of:=[.J22]-[.P22]" office:value-type="float" office:value="0.428699999999999" calcext:value-type="float">
            <text:p>0.4287</text:p>
          </table:table-cell>
          <table:table-cell table:style-name="ce172" table:formula="of:=([.R22]-([.C22]*[.$Q$16]))/([.D22]*[.O22])*100" office:value-type="float" office:value="3.29253386010275" calcext:value-type="float">
            <text:p>3.2925</text:p>
          </table:table-cell>
          <table:table-cell table:style-name="ce172" table:formula="of:=(([.P22]-[.I22])*[.$Q$16])/[.D22]*100" office:value-type="float" office:value="0.280008934822055" calcext:value-type="float">
            <text:p>0.2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9B</text:p>
          </table:table-cell>
          <table:table-cell table:style-name="ce1" office:value-type="float" office:value="9" calcext:value-type="float">
            <text:p>9</text:p>
          </table:table-cell>
          <table:table-cell table:style-name="ce169" office:value-type="float" office:value="0.4264" calcext:value-type="float">
            <text:p>0.4264</text:p>
          </table:table-cell>
          <table:table-cell table:style-name="ce169" office:value-type="float" office:value="0.9998" calcext:value-type="float">
            <text:p>0.9998</text:p>
          </table:table-cell>
          <table:table-cell table:style-name="ce169" office:value-type="float" office:value="1.0758" calcext:value-type="float">
            <text:p>1.0758</text:p>
          </table:table-cell>
          <table:table-cell table:style-name="ce169"/>
          <table:table-cell table:style-name="ce172" table:formula="of:=([.E23]-([.C23]*[.$F$16]))/[.D23]*100" office:value-type="float" office:value="65.072482159285" calcext:value-type="float">
            <text:p>65.0725</text:p>
          </table:table-cell>
          <table:table-cell table:style-name="ce172" table:formula="of:=([.E23]-([.C23]*[.$F$16]))/([.D23]*[.O23])*100" office:value-type="float" office:value="67.9040823951633" calcext:value-type="float">
            <text:p>67.9041</text:p>
          </table:table-cell>
          <table:table-cell table:style-name="ce169" office:value-type="float" office:value="21.8822" calcext:value-type="float">
            <text:p>21.8822</text:p>
          </table:table-cell>
          <table:table-cell table:style-name="ce169" office:value-type="float" office:value="22.797" calcext:value-type="float">
            <text:p>22.7970</text:p>
          </table:table-cell>
          <table:table-cell table:style-name="ce169" table:formula="of:=[.J23]-[.I23]" office:value-type="float" office:value="0.9148" calcext:value-type="float">
            <text:p>0.9148</text:p>
          </table:table-cell>
          <table:table-cell table:style-name="ce169"/>
          <table:table-cell table:style-name="ce172" table:formula="of:=(([.K23]-([.C23]*[.$L$16]))/[.D23])*100" office:value-type="float" office:value="49.0588801860304" calcext:value-type="float">
            <text:p>49.0589</text:p>
          </table:table-cell>
          <table:table-cell table:style-name="ce172" table:formula="of:=([.K23]-([.C23]*[.$L$16]))/([.D23]*[.O23])*100" office:value-type="float" office:value="51.1936556256187" calcext:value-type="float">
            <text:p>51.1937</text:p>
          </table:table-cell>
          <table:table-cell table:style-name="ce174" office:value-type="float" office:value="0.9583" calcext:value-type="float">
            <text:p>0.9583</text:p>
          </table:table-cell>
          <table:table-cell table:style-name="ce169" office:value-type="float" office:value="21.9369" calcext:value-type="float">
            <text:p>21.9369</text:p>
          </table:table-cell>
          <table:table-cell table:style-name="ce169"/>
          <table:table-cell table:style-name="ce169" table:formula="of:=[.J23]-[.P23]" office:value-type="float" office:value="0.860099999999999" calcext:value-type="float">
            <text:p>0.8601</text:p>
          </table:table-cell>
          <table:table-cell table:style-name="ce172" table:formula="of:=([.R23]-([.C23]*[.$Q$16]))/([.D23]*[.O23])*100" office:value-type="float" office:value="48.3316045223791" calcext:value-type="float">
            <text:p>48.3316</text:p>
          </table:table-cell>
          <table:table-cell table:style-name="ce172" table:formula="of:=(([.P23]-[.I23])*[.$Q$16])/[.D23]*100" office:value-type="float" office:value="5.09426190631543" calcext:value-type="float">
            <text:p>5.094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chilf</text:p>
          </table:table-cell>
          <table:table-cell table:style-name="ce1" office:value-type="float" office:value="10" calcext:value-type="float">
            <text:p>10</text:p>
          </table:table-cell>
          <table:table-cell table:style-name="ce169" office:value-type="float" office:value="0.4266" calcext:value-type="float">
            <text:p>0.4266</text:p>
          </table:table-cell>
          <table:table-cell table:style-name="ce169" office:value-type="float" office:value="1.0041" calcext:value-type="float">
            <text:p>1.0041</text:p>
          </table:table-cell>
          <table:table-cell table:style-name="ce169" office:value-type="float" office:value="1.1013" calcext:value-type="float">
            <text:p>1.1013</text:p>
          </table:table-cell>
          <table:table-cell table:style-name="ce169"/>
          <table:table-cell table:style-name="ce172" table:formula="of:=([.E24]-([.C24]*[.$F$16]))/[.D24]*100" office:value-type="float" office:value="67.3135381917561" calcext:value-type="float">
            <text:p>67.3135</text:p>
          </table:table-cell>
          <table:table-cell table:style-name="ce172" table:formula="of:=([.E24]-([.C24]*[.$F$16]))/([.D24]*[.O24])*100" office:value-type="float" office:value="68.926416333971" calcext:value-type="float">
            <text:p>68.9264</text:p>
          </table:table-cell>
          <table:table-cell table:style-name="ce169" office:value-type="float" office:value="21.9312" calcext:value-type="float">
            <text:p>21.9312</text:p>
          </table:table-cell>
          <table:table-cell table:style-name="ce169" office:value-type="float" office:value="22.4816" calcext:value-type="float">
            <text:p>22.4816</text:p>
          </table:table-cell>
          <table:table-cell table:style-name="ce169" table:formula="of:=[.J24]-[.I24]" office:value-type="float" office:value="0.5504" calcext:value-type="float">
            <text:p>0.5504</text:p>
          </table:table-cell>
          <table:table-cell table:style-name="ce169"/>
          <table:table-cell table:style-name="ce172" table:formula="of:=(([.K24]-([.C24]*[.$L$16]))/[.D24])*100" office:value-type="float" office:value="12.5377616493369" calcext:value-type="float">
            <text:p>12.5378</text:p>
          </table:table-cell>
          <table:table-cell table:style-name="ce172" table:formula="of:=([.K24]-([.C24]*[.$L$16]))/([.D24]*[.O24])*100" office:value-type="float" office:value="12.8381749430032" calcext:value-type="float">
            <text:p>12.8382</text:p>
          </table:table-cell>
          <table:table-cell table:style-name="ce174" office:value-type="float" office:value="0.9766" calcext:value-type="float">
            <text:p>0.9766</text:p>
          </table:table-cell>
          <table:table-cell table:style-name="ce169" office:value-type="float" office:value="21.9451" calcext:value-type="float">
            <text:p>21.9451</text:p>
          </table:table-cell>
          <table:table-cell table:style-name="ce169"/>
          <table:table-cell table:style-name="ce169" table:formula="of:=[.J24]-[.P24]" office:value-type="float" office:value="0.5365" calcext:value-type="float">
            <text:p>0.5365</text:p>
          </table:table-cell>
          <table:table-cell table:style-name="ce172" table:formula="of:=([.R24]-([.C24]*[.$Q$16]))/([.D24]*[.O24])*100" office:value-type="float" office:value="14.2037867124284" calcext:value-type="float">
            <text:p>14.2038</text:p>
          </table:table-cell>
          <table:table-cell table:style-name="ce172" table:formula="of:=(([.P24]-[.I24])*[.$Q$16])/[.D24]*100" office:value-type="float" office:value="1.28897622944615" calcext:value-type="float">
            <text:p>1.2890</text:p>
          </table:table-cell>
          <table:table-cell/>
          <table:table-cell table:style-name="ce176"/>
        </table:table-row>
        <table:table-row table:style-name="ro2">
          <table:table-cell table:style-name="ce1" office:value-type="string" calcext:value-type="string">
            <text:p>Trester</text:p>
          </table:table-cell>
          <table:table-cell table:style-name="ce1" office:value-type="float" office:value="11" calcext:value-type="float">
            <text:p>11</text:p>
          </table:table-cell>
          <table:table-cell table:style-name="ce169" office:value-type="float" office:value="0.4272" calcext:value-type="float">
            <text:p>0.4272</text:p>
          </table:table-cell>
          <table:table-cell table:style-name="ce169" office:value-type="float" office:value="1.0024" calcext:value-type="float">
            <text:p>1.0024</text:p>
          </table:table-cell>
          <table:table-cell table:style-name="ce169" office:value-type="float" office:value="0.9815" calcext:value-type="float">
            <text:p>0.9815</text:p>
          </table:table-cell>
          <table:table-cell table:style-name="ce169"/>
          <table:table-cell table:style-name="ce172" table:formula="of:=([.E25]-([.C25]*[.$F$16]))/[.D25]*100" office:value-type="float" office:value="55.4166917446226" calcext:value-type="float">
            <text:p>55.4167</text:p>
          </table:table-cell>
          <table:table-cell table:style-name="ce172" table:formula="of:=([.E25]-([.C25]*[.$F$16]))/([.D25]*[.O25])*100" office:value-type="float" office:value="57.0247908464937" calcext:value-type="float">
            <text:p>57.0248</text:p>
          </table:table-cell>
          <table:table-cell table:style-name="ce169" office:value-type="float" office:value="21.9124" calcext:value-type="float">
            <text:p>21.9124</text:p>
          </table:table-cell>
          <table:table-cell table:style-name="ce169" office:value-type="float" office:value="22.7612" calcext:value-type="float">
            <text:p>22.7612</text:p>
          </table:table-cell>
          <table:table-cell table:style-name="ce169" table:formula="of:=[.J25]-[.I25]" office:value-type="float" office:value="0.848799999999997" calcext:value-type="float">
            <text:p>0.8488</text:p>
          </table:table-cell>
          <table:table-cell table:style-name="ce169"/>
          <table:table-cell table:style-name="ce172" table:formula="of:=(([.K25]-([.C25]*[.$L$16]))/[.D25])*100" office:value-type="float" office:value="42.268017416617" calcext:value-type="float">
            <text:p>42.2680</text:p>
          </table:table-cell>
          <table:table-cell table:style-name="ce172" table:formula="of:=([.K25]-([.C25]*[.$L$16]))/([.D25]*[.O25])*100" office:value-type="float" office:value="43.4945641249404" calcext:value-type="float">
            <text:p>43.4946</text:p>
          </table:table-cell>
          <table:table-cell table:style-name="ce174" office:value-type="float" office:value="0.9718" calcext:value-type="float">
            <text:p>0.9718</text:p>
          </table:table-cell>
          <table:table-cell table:style-name="ce169" office:value-type="float" office:value="21.9192" calcext:value-type="float">
            <text:p>21.9192</text:p>
          </table:table-cell>
          <table:table-cell table:style-name="ce169"/>
          <table:table-cell table:style-name="ce169" table:formula="of:=[.J25]-[.P25]" office:value-type="float" office:value="0.841999999999999" calcext:value-type="float">
            <text:p>0.8420</text:p>
          </table:table-cell>
          <table:table-cell table:style-name="ce172" table:formula="of:=([.R25]-([.C25]*[.$Q$16]))/([.D25]*[.O25])*100" office:value-type="float" office:value="45.6020425797037" calcext:value-type="float">
            <text:p>45.6020</text:p>
          </table:table-cell>
          <table:table-cell table:style-name="ce172" table:formula="of:=(([.P25]-[.I25])*[.$Q$16])/[.D25]*100" office:value-type="float" office:value="0.631647715806448" calcext:value-type="float">
            <text:p>0.631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appen</text:p>
          </table:table-cell>
          <table:table-cell table:style-name="ce1" office:value-type="float" office:value="12" calcext:value-type="float">
            <text:p>12</text:p>
          </table:table-cell>
          <table:table-cell table:style-name="ce169" office:value-type="float" office:value="0.4243" calcext:value-type="float">
            <text:p>0.4243</text:p>
          </table:table-cell>
          <table:table-cell table:style-name="ce169" office:value-type="float" office:value="1.0039" calcext:value-type="float">
            <text:p>1.0039</text:p>
          </table:table-cell>
          <table:table-cell table:style-name="ce169" office:value-type="float" office:value="1.125" calcext:value-type="float">
            <text:p>1.1250</text:p>
          </table:table-cell>
          <table:table-cell table:style-name="ce169"/>
          <table:table-cell table:style-name="ce172" table:formula="of:=([.E26]-([.C26]*[.$F$16]))/[.D26]*100" office:value-type="float" office:value="69.9162060864799" calcext:value-type="float">
            <text:p>69.9162</text:p>
          </table:table-cell>
          <table:table-cell table:style-name="ce172" table:formula="of:=([.E26]-([.C26]*[.$F$16]))/([.D26]*[.O26])*100" office:value-type="float" office:value="71.9672733777456" calcext:value-type="float">
            <text:p>71.9673</text:p>
          </table:table-cell>
          <table:table-cell table:style-name="ce169" office:value-type="float" office:value="20.8393" calcext:value-type="float">
            <text:p>20.8393</text:p>
          </table:table-cell>
          <table:table-cell table:style-name="ce169" office:value-type="float" office:value="21.4926" calcext:value-type="float">
            <text:p>21.4926</text:p>
          </table:table-cell>
          <table:table-cell table:style-name="ce169" table:formula="of:=[.J26]-[.I26]" office:value-type="float" office:value="0.653299999999998" calcext:value-type="float">
            <text:p>0.6533</text:p>
          </table:table-cell>
          <table:table-cell table:style-name="ce169"/>
          <table:table-cell table:style-name="ce172" table:formula="of:=(([.K26]-([.C26]*[.$L$16]))/[.D26])*100" office:value-type="float" office:value="23.0182675145732" calcext:value-type="float">
            <text:p>23.0183</text:p>
          </table:table-cell>
          <table:table-cell table:style-name="ce172" table:formula="of:=([.K26]-([.C26]*[.$L$16]))/([.D26]*[.O26])*100" office:value-type="float" office:value="23.6935332110892" calcext:value-type="float">
            <text:p>23.6935</text:p>
          </table:table-cell>
          <table:table-cell table:style-name="ce174" office:value-type="float" office:value="0.9715" calcext:value-type="float">
            <text:p>0.9715</text:p>
          </table:table-cell>
          <table:table-cell table:style-name="ce169" office:value-type="float" office:value="20.8476" calcext:value-type="float">
            <text:p>20.8476</text:p>
          </table:table-cell>
          <table:table-cell table:style-name="ce169"/>
          <table:table-cell table:style-name="ce169" table:formula="of:=[.J26]-[.P26]" office:value-type="float" office:value="0.645" calcext:value-type="float">
            <text:p>0.6450</text:p>
          </table:table-cell>
          <table:table-cell table:style-name="ce172" table:formula="of:=([.R26]-([.C26]*[.$Q$16]))/([.D26]*[.O26])*100" office:value-type="float" office:value="25.6256894742908" calcext:value-type="float">
            <text:p>25.6257</text:p>
          </table:table-cell>
          <table:table-cell table:style-name="ce172" table:formula="of:=(([.P26]-[.I26])*[.$Q$16])/[.D26]*100" office:value-type="float" office:value="0.769829790829389" calcext:value-type="float">
            <text:p>0.7698</text:p>
          </table:table-cell>
          <table:table-cell table:number-columns-repeated="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 calcext:value-type="string">
            <text:p>Blank</text:p>
          </table:table-cell>
          <table:table-cell table:style-name="ce1" office:value-type="float" office:value="1" calcext:value-type="float">
            <text:p>1</text:p>
          </table:table-cell>
          <table:table-cell table:style-name="ce169" office:value-type="float" office:value="0.4309" calcext:value-type="float">
            <text:p>0.4309</text:p>
          </table:table-cell>
          <table:table-cell table:style-name="ce169" office:value-type="float" office:value="0" calcext:value-type="float">
            <text:p>0.0000</text:p>
          </table:table-cell>
          <table:table-cell table:style-name="ce169" office:value-type="float" office:value="0.428" calcext:value-type="float">
            <text:p>0.4280</text:p>
          </table:table-cell>
          <table:table-cell table:style-name="ce170" table:formula="of:=[.E29]/[.C29]" office:value-type="float" office:value="0.993269900208865" calcext:value-type="float">
            <text:p>0.9933</text:p>
          </table:table-cell>
          <table:table-cell table:style-name="ce172" table:number-columns-repeated="2"/>
          <table:table-cell table:style-name="ce169" office:value-type="float" office:value="20.4672" calcext:value-type="float">
            <text:p>20.4672</text:p>
          </table:table-cell>
          <table:table-cell table:style-name="ce169" office:value-type="float" office:value="20.8938" calcext:value-type="float">
            <text:p>20.8938</text:p>
          </table:table-cell>
          <table:table-cell table:style-name="ce169" table:formula="of:=[.J29]-[.I29]" office:value-type="float" office:value="0.426600000000001" calcext:value-type="float">
            <text:p>0.4266</text:p>
          </table:table-cell>
          <table:table-cell table:style-name="ce170" table:formula="of:=[.K29]/[.C29]" office:value-type="float" office:value="0.990020886516594" calcext:value-type="float">
            <text:p>0.9900</text:p>
          </table:table-cell>
          <table:table-cell table:style-name="ce172" table:number-columns-repeated="2"/>
          <table:table-cell table:style-name="ce174"/>
          <table:table-cell table:style-name="ce169" office:value-type="float" office:value="20.4682" calcext:value-type="float">
            <text:p>20.4682</text:p>
          </table:table-cell>
          <table:table-cell table:style-name="ce170" table:formula="of:=[.R29]/[.C29]" office:value-type="float" office:value="0.987700162450683" calcext:value-type="float">
            <text:p>0.9877</text:p>
          </table:table-cell>
          <table:table-cell table:style-name="ce169" table:formula="of:=[.J29]-[.P29]" office:value-type="float" office:value="0.425599999999999" calcext:value-type="float">
            <text:p>0.4256</text:p>
          </table:table-cell>
          <table:table-cell table:style-name="ce17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IK 3S</text:p>
          </table:table-cell>
          <table:table-cell table:style-name="ce1" office:value-type="float" office:value="2" calcext:value-type="float">
            <text:p>2</text:p>
          </table:table-cell>
          <table:table-cell table:style-name="ce169" office:value-type="float" office:value="0.4268" calcext:value-type="float">
            <text:p>0.4268</text:p>
          </table:table-cell>
          <table:table-cell table:style-name="ce169" office:value-type="float" office:value="0.9969" calcext:value-type="float">
            <text:p>0.9969</text:p>
          </table:table-cell>
          <table:table-cell table:style-name="ce169" office:value-type="float" office:value="1.246" calcext:value-type="float">
            <text:p>1.2460</text:p>
          </table:table-cell>
          <table:table-cell table:style-name="ce169"/>
          <table:table-cell table:style-name="ce172" table:formula="of:=([.E30]-([.C30]*[.$F$29]))/[.D30]*100" office:value-type="float" office:value="82.4628755733631" calcext:value-type="float">
            <text:p>82.4629</text:p>
          </table:table-cell>
          <table:table-cell table:style-name="ce172" table:formula="of:=([.E30]-([.C30]*[.$F$29]))/([.D30]*[.O30])*100" office:value-type="float" office:value="84.5946610313532" calcext:value-type="float">
            <text:p>84.5947</text:p>
          </table:table-cell>
          <table:table-cell table:style-name="ce169" office:value-type="float" office:value="22.0923" calcext:value-type="float">
            <text:p>22.0923</text:p>
          </table:table-cell>
          <table:table-cell table:style-name="ce169" office:value-type="float" office:value="22.5193" calcext:value-type="float">
            <text:p>22.5193</text:p>
          </table:table-cell>
          <table:table-cell table:style-name="ce169" table:formula="of:=[.J30]-[.I30]" office:value-type="float" office:value="0.427" calcext:value-type="float">
            <text:p>0.4270</text:p>
          </table:table-cell>
          <table:table-cell table:style-name="ce169"/>
          <table:table-cell table:style-name="ce172" table:formula="of:=([.K30]-([.C30]*[.$L$29]))/[.D30]*100" office:value-type="float" office:value="0.447295178525137" calcext:value-type="float">
            <text:p>0.4473</text:p>
          </table:table-cell>
          <table:table-cell table:style-name="ce172" table:formula="of:=([.K30]-([.C30]*[.$L$29]))/([.D30]*[.O30])*100" office:value-type="float" office:value="0.458858410468954" calcext:value-type="float">
            <text:p>0.4589</text:p>
          </table:table-cell>
          <table:table-cell table:style-name="ce174" office:value-type="float" office:value="0.9748" calcext:value-type="float">
            <text:p>0.9748</text:p>
          </table:table-cell>
          <table:table-cell table:style-name="ce169" office:value-type="float" office:value="22.0938" calcext:value-type="float">
            <text:p>22.0938</text:p>
          </table:table-cell>
          <table:table-cell table:style-name="ce169"/>
          <table:table-cell table:style-name="ce169" table:formula="of:=[.J30]-[.P30]" office:value-type="float" office:value="0.4255" calcext:value-type="float">
            <text:p>0.4255</text:p>
          </table:table-cell>
          <table:table-cell table:style-name="ce172" table:formula="of:=([.R30]-([.C30]*[.$Q$29]))/([.D30]*[.O30])*100" office:value-type="float" office:value="0.406427206454083" calcext:value-type="float">
            <text:p>0.4064</text:p>
          </table:table-cell>
          <table:table-cell table:style-name="ce172" table:formula="of:=(([.P30]-[.I30])*[.$Q$29])/[.D30]*100" office:value-type="float" office:value="0.148615733140343" calcext:value-type="float">
            <text:p>0.148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4S</text:p>
          </table:table-cell>
          <table:table-cell table:style-name="ce1" office:value-type="float" office:value="4" calcext:value-type="float">
            <text:p>4</text:p>
          </table:table-cell>
          <table:table-cell table:style-name="ce169" office:value-type="float" office:value="0.4241" calcext:value-type="float">
            <text:p>0.4241</text:p>
          </table:table-cell>
          <table:table-cell table:style-name="ce169" office:value-type="float" office:value="0.9979" calcext:value-type="float">
            <text:p>0.9979</text:p>
          </table:table-cell>
          <table:table-cell table:style-name="ce169" office:value-type="float" office:value="1.1591" calcext:value-type="float">
            <text:p>1.1591</text:p>
          </table:table-cell>
          <table:table-cell table:style-name="ce169"/>
          <table:table-cell table:style-name="ce172" table:formula="of:=([.E31]-([.C31]*[.$F$29]))/[.D31]*100" office:value-type="float" office:value="73.9406990000421" calcext:value-type="float">
            <text:p>73.9407</text:p>
          </table:table-cell>
          <table:table-cell table:style-name="ce172" table:formula="of:=([.E31]-([.C31]*[.$F$29]))/([.D31]*[.O31])*100" office:value-type="float" office:value="75.3881515090152" calcext:value-type="float">
            <text:p>75.3882</text:p>
          </table:table-cell>
          <table:table-cell table:style-name="ce169" office:value-type="float" office:value="22.1919" calcext:value-type="float">
            <text:p>22.1919</text:p>
          </table:table-cell>
          <table:table-cell table:style-name="ce169" office:value-type="float" office:value="22.6446" calcext:value-type="float">
            <text:p>22.6446</text:p>
          </table:table-cell>
          <table:table-cell table:style-name="ce169" table:formula="of:=[.J31]-[.I31]" office:value-type="float" office:value="0.4527" calcext:value-type="float">
            <text:p>0.4527</text:p>
          </table:table-cell>
          <table:table-cell table:style-name="ce169"/>
          <table:table-cell table:style-name="ce172" table:formula="of:=([.K31]-([.C31]*[.$L$29]))/[.D31]*100" office:value-type="float" office:value="3.29012346210166" calcext:value-type="float">
            <text:p>3.2901</text:p>
          </table:table-cell>
          <table:table-cell table:style-name="ce172" table:formula="of:=([.K31]-([.C31]*[.$L$29]))/([.D31]*[.O31])*100" office:value-type="float" office:value="3.35453044667788" calcext:value-type="float">
            <text:p>3.3545</text:p>
          </table:table-cell>
          <table:table-cell table:style-name="ce174" office:value-type="float" office:value="0.9808" calcext:value-type="float">
            <text:p>0.9808</text:p>
          </table:table-cell>
          <table:table-cell table:style-name="ce169" office:value-type="float" office:value="22.1922" calcext:value-type="float">
            <text:p>22.1922</text:p>
          </table:table-cell>
          <table:table-cell table:style-name="ce169"/>
          <table:table-cell table:style-name="ce169" table:formula="of:=[.J31]-[.P31]" office:value-type="float" office:value="0.452400000000001" calcext:value-type="float">
            <text:p>0.4524</text:p>
          </table:table-cell>
          <table:table-cell table:style-name="ce172" table:formula="of:=([.R31]-([.C31]*[.$Q$29]))/([.D31]*[.O31])*100" office:value-type="float" office:value="3.42443857883224" calcext:value-type="float">
            <text:p>3.4244</text:p>
          </table:table-cell>
          <table:table-cell table:style-name="ce172" table:formula="of:=(([.P31]-[.I31])*[.$Q$29])/[.D31]*100" office:value-type="float" office:value="0.0296933609314074" calcext:value-type="float">
            <text:p>0.029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7S</text:p>
          </table:table-cell>
          <table:table-cell table:style-name="ce1" office:value-type="float" office:value="5" calcext:value-type="float">
            <text:p>5</text:p>
          </table:table-cell>
          <table:table-cell table:style-name="ce169" office:value-type="float" office:value="0.4246" calcext:value-type="float">
            <text:p>0.4246</text:p>
          </table:table-cell>
          <table:table-cell table:style-name="ce169" office:value-type="float" office:value="1.0043" calcext:value-type="float">
            <text:p>1.0043</text:p>
          </table:table-cell>
          <table:table-cell table:style-name="ce169" office:value-type="float" office:value="1.2673" calcext:value-type="float">
            <text:p>1.2673</text:p>
          </table:table-cell>
          <table:table-cell table:style-name="ce169"/>
          <table:table-cell table:style-name="ce172" table:formula="of:=([.E32]-([.C32]*[.$F$29]))/[.D32]*100" office:value-type="float" office:value="84.1937270109844" calcext:value-type="float">
            <text:p>84.1937</text:p>
          </table:table-cell>
          <table:table-cell table:style-name="ce172" table:formula="of:=([.E32]-([.C32]*[.$F$29]))/([.D32]*[.O32])*100" office:value-type="float" office:value="85.8681560540381" calcext:value-type="float">
            <text:p>85.8682</text:p>
          </table:table-cell>
          <table:table-cell table:style-name="ce169" office:value-type="float" office:value="21.1607" calcext:value-type="float">
            <text:p>21.1607</text:p>
          </table:table-cell>
          <table:table-cell table:style-name="ce169" office:value-type="float" office:value="22.2319" calcext:value-type="float">
            <text:p>22.2319</text:p>
          </table:table-cell>
          <table:table-cell table:style-name="ce169" table:formula="of:=[.J32]-[.I32]" office:value-type="float" office:value="1.0712" calcext:value-type="float">
            <text:p>1.0712</text:p>
          </table:table-cell>
          <table:table-cell table:style-name="ce169"/>
          <table:table-cell table:style-name="ce172" table:formula="of:=([.K32]-([.C32]*[.$L$29]))/[.D32]*100" office:value-type="float" office:value="64.805051437325" calcext:value-type="float">
            <text:p>64.8051</text:p>
          </table:table-cell>
          <table:table-cell table:style-name="ce172" table:formula="of:=([.K32]-([.C32]*[.$L$29]))/([.D32]*[.O32])*100" office:value-type="float" office:value="66.0938821390362" calcext:value-type="float">
            <text:p>66.0939</text:p>
          </table:table-cell>
          <table:table-cell table:style-name="ce174" office:value-type="float" office:value="0.9805" calcext:value-type="float">
            <text:p>0.9805</text:p>
          </table:table-cell>
          <table:table-cell table:style-name="ce169" office:value-type="float" office:value="21.3369" calcext:value-type="float">
            <text:p>21.3369</text:p>
          </table:table-cell>
          <table:table-cell table:style-name="ce169"/>
          <table:table-cell table:style-name="ce169" table:formula="of:=[.J32]-[.P32]" office:value-type="float" office:value="0.895" calcext:value-type="float">
            <text:p>0.8950</text:p>
          </table:table-cell>
          <table:table-cell table:style-name="ce172" table:formula="of:=([.R32]-([.C32]*[.$Q$29]))/([.D32]*[.O32])*100" office:value-type="float" office:value="48.3004682134481" calcext:value-type="float">
            <text:p>48.3005</text:p>
          </table:table-cell>
          <table:table-cell table:style-name="ce172" table:formula="of:=(([.P32]-[.I32])*[.$Q$29])/[.D32]*100" office:value-type="float" office:value="17.3287631807042" calcext:value-type="float">
            <text:p>17.328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5</text:p>
          </table:table-cell>
          <table:table-cell table:style-name="ce1" office:value-type="float" office:value="6" calcext:value-type="float">
            <text:p>6</text:p>
          </table:table-cell>
          <table:table-cell table:style-name="ce169" office:value-type="float" office:value="0.4264" calcext:value-type="float">
            <text:p>0.4264</text:p>
          </table:table-cell>
          <table:table-cell table:style-name="ce169" office:value-type="float" office:value="1.0016" calcext:value-type="float">
            <text:p>1.0016</text:p>
          </table:table-cell>
          <table:table-cell table:style-name="ce169" office:value-type="float" office:value="1.1632" calcext:value-type="float">
            <text:p>1.1632</text:p>
          </table:table-cell>
          <table:table-cell table:style-name="ce169"/>
          <table:table-cell table:style-name="ce172" table:formula="of:=([.E33]-([.C33]*[.$F$29]))/[.D33]*100" office:value-type="float" office:value="73.848813353728" calcext:value-type="float">
            <text:p>73.8488</text:p>
          </table:table-cell>
          <table:table-cell table:style-name="ce172" table:formula="of:=([.E33]-([.C33]*[.$F$29]))/([.D33]*[.O33])*100" office:value-type="float" office:value="75.38670207608" calcext:value-type="float">
            <text:p>75.3867</text:p>
          </table:table-cell>
          <table:table-cell table:style-name="ce169" office:value-type="float" office:value="22.5319" calcext:value-type="float">
            <text:p>22.5319</text:p>
          </table:table-cell>
          <table:table-cell table:style-name="ce169" office:value-type="float" office:value="22.9906" calcext:value-type="float">
            <text:p>22.9906</text:p>
          </table:table-cell>
          <table:table-cell table:style-name="ce169" table:formula="of:=[.J33]-[.I33]" office:value-type="float" office:value="0.4587" calcext:value-type="float">
            <text:p>0.4587</text:p>
          </table:table-cell>
          <table:table-cell table:style-name="ce169"/>
          <table:table-cell table:style-name="ce172" table:formula="of:=([.K33]-([.C33]*[.$L$29]))/[.D33]*100" office:value-type="float" office:value="3.64966992704917" calcext:value-type="float">
            <text:p>3.6497</text:p>
          </table:table-cell>
          <table:table-cell table:style-name="ce172" table:formula="of:=([.K33]-([.C33]*[.$L$29]))/([.D33]*[.O33])*100" office:value-type="float" office:value="3.72567366991545" calcext:value-type="float">
            <text:p>3.7257</text:p>
          </table:table-cell>
          <table:table-cell table:style-name="ce174" office:value-type="float" office:value="0.9796" calcext:value-type="float">
            <text:p>0.9796</text:p>
          </table:table-cell>
          <table:table-cell table:style-name="ce169" office:value-type="float" office:value="22.5336" calcext:value-type="float">
            <text:p>22.5336</text:p>
          </table:table-cell>
          <table:table-cell table:style-name="ce169"/>
          <table:table-cell table:style-name="ce169" table:formula="of:=[.J33]-[.P33]" office:value-type="float" office:value="0.457000000000001" calcext:value-type="float">
            <text:p>0.4570</text:p>
          </table:table-cell>
          <table:table-cell table:style-name="ce172" table:formula="of:=([.R33]-([.C33]*[.$Q$29]))/([.D33]*[.O33])*100" office:value-type="float" office:value="3.65326571106376" calcext:value-type="float">
            <text:p>3.6533</text:p>
          </table:table-cell>
          <table:table-cell table:style-name="ce172" table:formula="of:=(([.P33]-[.I33])*[.$Q$29])/[.D33]*100" office:value-type="float" office:value="0.167640802332843" calcext:value-type="float">
            <text:p>0.167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3B</text:p>
          </table:table-cell>
          <table:table-cell table:style-name="ce1" office:value-type="float" office:value="7" calcext:value-type="float">
            <text:p>7</text:p>
          </table:table-cell>
          <table:table-cell table:style-name="ce169" office:value-type="float" office:value="0.4262" calcext:value-type="float">
            <text:p>0.4262</text:p>
          </table:table-cell>
          <table:table-cell table:style-name="ce169" office:value-type="float" office:value="1.0001" calcext:value-type="float">
            <text:p>1.0001</text:p>
          </table:table-cell>
          <table:table-cell table:style-name="ce169" office:value-type="float" office:value="1.0031" calcext:value-type="float">
            <text:p>1.0031</text:p>
          </table:table-cell>
          <table:table-cell table:style-name="ce169"/>
          <table:table-cell table:style-name="ce172" table:formula="of:=([.E34]-([.C34]*[.$F$29]))/[.D34]*100" office:value-type="float" office:value="57.9710397491233" calcext:value-type="float">
            <text:p>57.9710</text:p>
          </table:table-cell>
          <table:table-cell table:style-name="ce172" table:formula="of:=([.E34]-([.C34]*[.$F$29]))/([.D34]*[.O34])*100" office:value-type="float" office:value="61.9944816053077" calcext:value-type="float">
            <text:p>61.9945</text:p>
          </table:table-cell>
          <table:table-cell table:style-name="ce169" office:value-type="float" office:value="21.7668" calcext:value-type="float">
            <text:p>21.7668</text:p>
          </table:table-cell>
          <table:table-cell table:style-name="ce169" office:value-type="float" office:value="22.1918" calcext:value-type="float">
            <text:p>22.1918</text:p>
          </table:table-cell>
          <table:table-cell table:style-name="ce169" table:formula="of:=[.J34]-[.I34]" office:value-type="float" office:value="0.425000000000001" calcext:value-type="float">
            <text:p>0.4250</text:p>
          </table:table-cell>
          <table:table-cell table:style-name="ce169"/>
          <table:table-cell table:style-name="ce172" table:formula="of:=([.K34]-([.C34]*[.$L$29]))/[.D34]*100" office:value-type="float" office:value="0.305279288733945" calcext:value-type="float">
            <text:p>0.3053</text:p>
          </table:table-cell>
          <table:table-cell table:style-name="ce172" table:formula="of:=([.K34]-([.C34]*[.$L$29]))/([.D34]*[.O34])*100" office:value-type="float" office:value="0.326466996828088" calcext:value-type="float">
            <text:p>0.3265</text:p>
          </table:table-cell>
          <table:table-cell table:style-name="ce174" office:value-type="float" office:value="0.9351" calcext:value-type="float">
            <text:p>0.9351</text:p>
          </table:table-cell>
          <table:table-cell table:style-name="ce169" office:value-type="float" office:value="21.7679" calcext:value-type="float">
            <text:p>21.7679</text:p>
          </table:table-cell>
          <table:table-cell table:style-name="ce169"/>
          <table:table-cell table:style-name="ce169" table:formula="of:=[.J34]-[.P34]" office:value-type="float" office:value="0.4239" calcext:value-type="float">
            <text:p>0.4239</text:p>
          </table:table-cell>
          <table:table-cell table:style-name="ce172" table:formula="of:=([.R34]-([.C34]*[.$Q$29]))/([.D34]*[.O34])*100" office:value-type="float" office:value="0.314607696915967" calcext:value-type="float">
            <text:p>0.3146</text:p>
          </table:table-cell>
          <table:table-cell table:style-name="ce172" table:formula="of:=(([.P34]-[.I34])*[.$Q$29])/[.D34]*100" office:value-type="float" office:value="0.108636154254247" calcext:value-type="float">
            <text:p>0.108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8</text:p>
          </table:table-cell>
          <table:table-cell table:style-name="ce1" office:value-type="float" office:value="8" calcext:value-type="float">
            <text:p>8</text:p>
          </table:table-cell>
          <table:table-cell table:style-name="ce169" office:value-type="float" office:value="0.4249" calcext:value-type="float">
            <text:p>0.4249</text:p>
          </table:table-cell>
          <table:table-cell table:style-name="ce169" office:value-type="float" office:value="0.9986" calcext:value-type="float">
            <text:p>0.9986</text:p>
          </table:table-cell>
          <table:table-cell table:style-name="ce169" office:value-type="float" office:value="1.253" calcext:value-type="float">
            <text:p>1.2530</text:p>
          </table:table-cell>
          <table:table-cell table:style-name="ce169"/>
          <table:table-cell table:style-name="ce172" table:formula="of:=([.E35]-([.C35]*[.$F$29]))/[.D35]*100" office:value-type="float" office:value="83.2124593832619" calcext:value-type="float">
            <text:p>83.2125</text:p>
          </table:table-cell>
          <table:table-cell table:style-name="ce172" table:formula="of:=([.E35]-([.C35]*[.$F$29]))/([.D35]*[.O35])*100" office:value-type="float" office:value="84.9453444092098" calcext:value-type="float">
            <text:p>84.9453</text:p>
          </table:table-cell>
          <table:table-cell table:style-name="ce169" office:value-type="float" office:value="21.3085" calcext:value-type="float">
            <text:p>21.3085</text:p>
          </table:table-cell>
          <table:table-cell table:style-name="ce169" office:value-type="float" office:value="22.3787" calcext:value-type="float">
            <text:p>22.3787</text:p>
          </table:table-cell>
          <table:table-cell table:style-name="ce169" table:formula="of:=[.J35]-[.I35]" office:value-type="float" office:value="1.0702" calcext:value-type="float">
            <text:p>1.0702</text:p>
          </table:table-cell>
          <table:table-cell table:style-name="ce169"/>
          <table:table-cell table:style-name="ce172" table:formula="of:=([.K35]-([.C35]*[.$L$29]))/[.D35]*100" office:value-type="float" office:value="65.0450756378028" calcext:value-type="float">
            <text:p>65.0451</text:p>
          </table:table-cell>
          <table:table-cell table:style-name="ce172" table:formula="of:=([.K35]-([.C35]*[.$L$29]))/([.D35]*[.O35])*100" office:value-type="float" office:value="66.3996280500233" calcext:value-type="float">
            <text:p>66.3996</text:p>
          </table:table-cell>
          <table:table-cell table:style-name="ce174" office:value-type="float" office:value="0.9796" calcext:value-type="float">
            <text:p>0.9796</text:p>
          </table:table-cell>
          <table:table-cell table:style-name="ce169" office:value-type="float" office:value="21.3649" calcext:value-type="float">
            <text:p>21.3649</text:p>
          </table:table-cell>
          <table:table-cell table:style-name="ce169"/>
          <table:table-cell table:style-name="ce169" table:formula="of:=[.J35]-[.P35]" office:value-type="float" office:value="1.0138" calcext:value-type="float">
            <text:p>1.0138</text:p>
          </table:table-cell>
          <table:table-cell table:style-name="ce172" table:formula="of:=([.R35]-([.C35]*[.$Q$29]))/([.D35]*[.O35])*100" office:value-type="float" office:value="60.7349064695785" calcext:value-type="float">
            <text:p>60.7349</text:p>
          </table:table-cell>
          <table:table-cell table:style-name="ce172" table:formula="of:=(([.P35]-[.I35])*[.$Q$29])/[.D35]*100" office:value-type="float" office:value="5.57843873044448" calcext:value-type="float">
            <text:p>5.578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4</text:p>
          </table:table-cell>
          <table:table-cell table:style-name="ce1" office:value-type="float" office:value="9" calcext:value-type="float">
            <text:p>9</text:p>
          </table:table-cell>
          <table:table-cell table:style-name="ce169" office:value-type="float" office:value="0.4251" calcext:value-type="float">
            <text:p>0.4251</text:p>
          </table:table-cell>
          <table:table-cell table:style-name="ce169" office:value-type="float" office:value="0.9987" calcext:value-type="float">
            <text:p>0.9987</text:p>
          </table:table-cell>
          <table:table-cell table:style-name="ce169" office:value-type="float" office:value="1.2028" calcext:value-type="float">
            <text:p>1.2028</text:p>
          </table:table-cell>
          <table:table-cell table:style-name="ce169"/>
          <table:table-cell table:style-name="ce172" table:formula="of:=([.E36]-([.C36]*[.$F$29]))/[.D36]*100" office:value-type="float" office:value="78.1577015541415" calcext:value-type="float">
            <text:p>78.1577</text:p>
          </table:table-cell>
          <table:table-cell table:style-name="ce172" table:formula="of:=([.E36]-([.C36]*[.$F$29]))/([.D36]*[.O36])*100" office:value-type="float" office:value="79.9485490529271" calcext:value-type="float">
            <text:p>79.9485</text:p>
          </table:table-cell>
          <table:table-cell table:style-name="ce169" office:value-type="float" office:value="21.8822" calcext:value-type="float">
            <text:p>21.8822</text:p>
          </table:table-cell>
          <table:table-cell table:style-name="ce169" office:value-type="float" office:value="22.366" calcext:value-type="float">
            <text:p>22.3660</text:p>
          </table:table-cell>
          <table:table-cell table:style-name="ce169" table:formula="of:=[.J36]-[.I36]" office:value-type="float" office:value="0.483799999999999" calcext:value-type="float">
            <text:p>0.4838</text:p>
          </table:table-cell>
          <table:table-cell table:style-name="ce169"/>
          <table:table-cell table:style-name="ce172" table:formula="of:=([.K36]-([.C36]*[.$L$29]))/[.D36]*100" office:value-type="float" office:value="6.30240524099273" calcext:value-type="float">
            <text:p>6.3024</text:p>
          </table:table-cell>
          <table:table-cell table:style-name="ce172" table:formula="of:=([.K36]-([.C36]*[.$L$29]))/([.D36]*[.O36])*100" office:value-type="float" office:value="6.44681387171924" calcext:value-type="float">
            <text:p>6.4468</text:p>
          </table:table-cell>
          <table:table-cell table:style-name="ce174" office:value-type="float" office:value="0.9776" calcext:value-type="float">
            <text:p>0.9776</text:p>
          </table:table-cell>
          <table:table-cell table:style-name="ce169" office:value-type="float" office:value="21.8841" calcext:value-type="float">
            <text:p>21.8841</text:p>
          </table:table-cell>
          <table:table-cell table:style-name="ce169"/>
          <table:table-cell table:style-name="ce169" table:formula="of:=[.J36]-[.P36]" office:value-type="float" office:value="0.4819" calcext:value-type="float">
            <text:p>0.4819</text:p>
          </table:table-cell>
          <table:table-cell table:style-name="ce172" table:formula="of:=([.R36]-([.C36]*[.$Q$29]))/([.D36]*[.O36])*100" office:value-type="float" office:value="6.35325318804526" calcext:value-type="float">
            <text:p>6.3533</text:p>
          </table:table-cell>
          <table:table-cell table:style-name="ce172" table:formula="of:=(([.P36]-[.I36])*[.$Q$29])/[.D36]*100" office:value-type="float" office:value="0.187907310369023" calcext:value-type="float">
            <text:p>0.187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5B</text:p>
          </table:table-cell>
          <table:table-cell table:style-name="ce1" office:value-type="float" office:value="10" calcext:value-type="float">
            <text:p>10</text:p>
          </table:table-cell>
          <table:table-cell table:style-name="ce169" office:value-type="float" office:value="0.4242" calcext:value-type="float">
            <text:p>0.4242</text:p>
          </table:table-cell>
          <table:table-cell table:style-name="ce169" office:value-type="float" office:value="1.0013" calcext:value-type="float">
            <text:p>1.0013</text:p>
          </table:table-cell>
          <table:table-cell table:style-name="ce169" office:value-type="float" office:value="1.069" calcext:value-type="float">
            <text:p>1.0690</text:p>
          </table:table-cell>
          <table:table-cell table:style-name="ce169"/>
          <table:table-cell table:style-name="ce172" table:formula="of:=([.E37]-([.C37]*[.$F$29]))/[.D37]*100" office:value-type="float" office:value="64.6814050066313" calcext:value-type="float">
            <text:p>64.6814</text:p>
          </table:table-cell>
          <table:table-cell table:style-name="ce172" table:formula="of:=([.E37]-([.C37]*[.$F$29]))/([.D37]*[.O37])*100" office:value-type="float" office:value="66.9302618032195" calcext:value-type="float">
            <text:p>66.9303</text:p>
          </table:table-cell>
          <table:table-cell table:style-name="ce169" office:value-type="float" office:value="21.9313" calcext:value-type="float">
            <text:p>21.9313</text:p>
          </table:table-cell>
          <table:table-cell table:style-name="ce169" office:value-type="float" office:value="22.3583" calcext:value-type="float">
            <text:p>22.3583</text:p>
          </table:table-cell>
          <table:table-cell table:style-name="ce169" table:formula="of:=[.J37]-[.I37]" office:value-type="float" office:value="0.427" calcext:value-type="float">
            <text:p>0.4270</text:p>
          </table:table-cell>
          <table:table-cell table:style-name="ce169"/>
          <table:table-cell table:style-name="ce172" table:formula="of:=([.K37]-([.C37]*[.$L$29]))/[.D37]*100" office:value-type="float" office:value="0.702400872831345" calcext:value-type="float">
            <text:p>0.7024</text:p>
          </table:table-cell>
          <table:table-cell table:style-name="ce172" table:formula="of:=([.K37]-([.C37]*[.$L$29]))/([.D37]*[.O37])*100" office:value-type="float" office:value="0.726822095231111" calcext:value-type="float">
            <text:p>0.7268</text:p>
          </table:table-cell>
          <table:table-cell table:style-name="ce174" office:value-type="float" office:value="0.9664" calcext:value-type="float">
            <text:p>0.9664</text:p>
          </table:table-cell>
          <table:table-cell table:style-name="ce169" office:value-type="float" office:value="21.9319" calcext:value-type="float">
            <text:p>21.9319</text:p>
          </table:table-cell>
          <table:table-cell table:style-name="ce169"/>
          <table:table-cell table:style-name="ce169" table:formula="of:=[.J37]-[.P37]" office:value-type="float" office:value="0.426400000000001" calcext:value-type="float">
            <text:p>0.4264</text:p>
          </table:table-cell>
          <table:table-cell table:style-name="ce172" table:formula="of:=([.R37]-([.C37]*[.$Q$29]))/([.D37]*[.O37])*100" office:value-type="float" office:value="0.766552228834842" calcext:value-type="float">
            <text:p>0.7666</text:p>
          </table:table-cell>
          <table:table-cell table:style-name="ce172" table:formula="of:=(([.P37]-[.I37])*[.$Q$29])/[.D37]*100" office:value-type="float" office:value="0.0591850691569988" calcext:value-type="float">
            <text:p>0.059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2</text:p>
          </table:table-cell>
          <table:table-cell table:style-name="ce1" office:value-type="float" office:value="11" calcext:value-type="float">
            <text:p>11</text:p>
          </table:table-cell>
          <table:table-cell table:style-name="ce169" office:value-type="float" office:value="0.4262" calcext:value-type="float">
            <text:p>0.4262</text:p>
          </table:table-cell>
          <table:table-cell table:style-name="ce169" office:value-type="float" office:value="1.0044" calcext:value-type="float">
            <text:p>1.0044</text:p>
          </table:table-cell>
          <table:table-cell table:style-name="ce169" office:value-type="float" office:value="1.1649" calcext:value-type="float">
            <text:p>1.1649</text:p>
          </table:table-cell>
          <table:table-cell table:style-name="ce169"/>
          <table:table-cell table:style-name="ce172" table:formula="of:=([.E38]-([.C38]*[.$F$29]))/[.D38]*100" office:value-type="float" office:value="73.831976158003" calcext:value-type="float">
            <text:p>73.8320</text:p>
          </table:table-cell>
          <table:table-cell table:style-name="ce172" table:formula="of:=([.E38]-([.C38]*[.$F$29]))/([.D38]*[.O38])*100" office:value-type="float" office:value="75.7484109551687" calcext:value-type="float">
            <text:p>75.7484</text:p>
          </table:table-cell>
          <table:table-cell table:style-name="ce169" office:value-type="float" office:value="21.9123" calcext:value-type="float">
            <text:p>21.9123</text:p>
          </table:table-cell>
          <table:table-cell table:style-name="ce169" office:value-type="float" office:value="22.3407" calcext:value-type="float">
            <text:p>22.3407</text:p>
          </table:table-cell>
          <table:table-cell table:style-name="ce169" table:formula="of:=[.J38]-[.I38]" office:value-type="float" office:value="0.4284" calcext:value-type="float">
            <text:p>0.4284</text:p>
          </table:table-cell>
          <table:table-cell table:style-name="ce169"/>
          <table:table-cell table:style-name="ce172" table:formula="of:=([.K38]-([.C38]*[.$L$29]))/[.D38]*100" office:value-type="float" office:value="0.642482891938209" calcext:value-type="float">
            <text:p>0.6425</text:p>
          </table:table-cell>
          <table:table-cell table:style-name="ce172" table:formula="of:=([.K38]-([.C38]*[.$L$29]))/([.D38]*[.O38])*100" office:value-type="float" office:value="0.659159630592191" calcext:value-type="float">
            <text:p>0.6592</text:p>
          </table:table-cell>
          <table:table-cell table:style-name="ce174" office:value-type="float" office:value="0.9747" calcext:value-type="float">
            <text:p>0.9747</text:p>
          </table:table-cell>
          <table:table-cell table:style-name="ce169" office:value-type="float" office:value="21.9144" calcext:value-type="float">
            <text:p>21.9144</text:p>
          </table:table-cell>
          <table:table-cell table:style-name="ce169"/>
          <table:table-cell table:style-name="ce169" table:formula="of:=[.J38]-[.P38]" office:value-type="float" office:value="0.426299999999998" calcext:value-type="float">
            <text:p>0.4263</text:p>
          </table:table-cell>
          <table:table-cell table:style-name="ce172" table:formula="of:=([.R38]-([.C38]*[.$Q$29]))/([.D38]*[.O38])*100" office:value-type="float" office:value="0.54568463074737" calcext:value-type="float">
            <text:p>0.5457</text:p>
          </table:table-cell>
          <table:table-cell table:style-name="ce172" table:formula="of:=(([.P38]-[.I38])*[.$Q$29])/[.D38]*100" office:value-type="float" office:value="0.206508397167326" calcext:value-type="float">
            <text:p>0.206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K 6B</text:p>
          </table:table-cell>
          <table:table-cell table:style-name="ce1" office:value-type="float" office:value="12" calcext:value-type="float">
            <text:p>12</text:p>
          </table:table-cell>
          <table:table-cell table:style-name="ce169" office:value-type="float" office:value="0.424" calcext:value-type="float">
            <text:p>0.4240</text:p>
          </table:table-cell>
          <table:table-cell table:style-name="ce169" office:value-type="float" office:value="1.0006" calcext:value-type="float">
            <text:p>1.0006</text:p>
          </table:table-cell>
          <table:table-cell table:style-name="ce169" office:value-type="float" office:value="1.0203" calcext:value-type="float">
            <text:p>1.0203</text:p>
          </table:table-cell>
          <table:table-cell table:style-name="ce169"/>
          <table:table-cell table:style-name="ce172" table:formula="of:=([.E39]-([.C39]*[.$F$29]))/[.D39]*100" office:value-type="float" office:value="59.8794285739997" calcext:value-type="float">
            <text:p>59.8794</text:p>
          </table:table-cell>
          <table:table-cell table:style-name="ce172" table:formula="of:=([.E39]-([.C39]*[.$F$29]))/([.D39]*[.O39])*100" office:value-type="float" office:value="62.0769526995643" calcext:value-type="float">
            <text:p>62.0770</text:p>
          </table:table-cell>
          <table:table-cell table:style-name="ce169" office:value-type="float" office:value="20.8391" calcext:value-type="float">
            <text:p>20.8391</text:p>
          </table:table-cell>
          <table:table-cell table:style-name="ce169" office:value-type="float" office:value="21.3158" calcext:value-type="float">
            <text:p>21.3158</text:p>
          </table:table-cell>
          <table:table-cell table:style-name="ce169" table:formula="of:=[.J39]-[.I39]" office:value-type="float" office:value="0.476700000000001" calcext:value-type="float">
            <text:p>0.4767</text:p>
          </table:table-cell>
          <table:table-cell table:style-name="ce169"/>
          <table:table-cell table:style-name="ce172" table:formula="of:=([.K39]-([.C39]*[.$L$29]))/[.D39]*100" office:value-type="float" office:value="5.6897005913417" calcext:value-type="float">
            <text:p>5.6897</text:p>
          </table:table-cell>
          <table:table-cell table:style-name="ce172" table:formula="of:=([.K39]-([.C39]*[.$L$29]))/([.D39]*[.O39])*100" office:value-type="float" office:value="5.89850776626757" calcext:value-type="float">
            <text:p>5.8985</text:p>
          </table:table-cell>
          <table:table-cell table:style-name="ce174" office:value-type="float" office:value="0.9646" calcext:value-type="float">
            <text:p>0.9646</text:p>
          </table:table-cell>
          <table:table-cell table:style-name="ce169" office:value-type="float" office:value="20.8418" calcext:value-type="float">
            <text:p>20.8418</text:p>
          </table:table-cell>
          <table:table-cell table:style-name="ce169"/>
          <table:table-cell table:style-name="ce169" table:formula="of:=[.J39]-[.P39]" office:value-type="float" office:value="0.474" calcext:value-type="float">
            <text:p>0.4740</text:p>
          </table:table-cell>
          <table:table-cell table:style-name="ce172" table:formula="of:=([.R39]-([.C39]*[.$Q$29]))/([.D39]*[.O39])*100" office:value-type="float" office:value="5.72071552019137" calcext:value-type="float">
            <text:p>5.7207</text:p>
          </table:table-cell>
          <table:table-cell table:style-name="ce172" table:formula="of:=(([.P39]-[.I39])*[.$Q$29])/[.D39]*100" office:value-type="float" office:value="0.266519132382335" calcext:value-type="float">
            <text:p>0.2665</text:p>
          </table:table-cell>
          <table:table-cell table:number-columns-repeated="2"/>
        </table:table-row>
        <table:table-row table:style-name="ro2" table:number-rows-repeated="104853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ibertherm geordnet" table:style-name="ta1">
        <office:forms form:automatic-focus="false" form:apply-design-mode="false"/>
        <table:table-column table:style-name="co12" table:default-cell-style-name="ce149"/>
        <table:table-column table:style-name="co13" table:default-cell-style-name="ce154"/>
        <table:table-column table:style-name="co14" table:default-cell-style-name="ce157"/>
        <table:table-column table:style-name="co1" table:default-cell-style-name="ce159"/>
        <table:table-column table:style-name="co1" table:default-cell-style-name="ce162"/>
        <table:table-column table:style-name="co1" table:number-columns-repeated="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row table:style-name="ro2">
          <table:table-cell table:style-name="ce1" office:value-type="string" calcext:value-type="string">
            <text:p>Probe</text:p>
          </table:table-cell>
          <table:table-cell table:style-name="ce151" office:value-type="string" calcext:value-type="string">
            <text:p>ADF DM basis</text:p>
          </table:table-cell>
          <table:table-cell table:style-name="ce151" office:value-type="string" calcext:value-type="string">
            <text:p>ADL DM basis</text:p>
          </table:table-cell>
          <table:table-cell table:style-name="ce151" office:value-type="string" calcext:value-type="string">
            <text:p>AFD-ADL</text:p>
          </table:table-cell>
          <table:table-cell table:style-name="ce160" office:value-type="string" calcext:value-type="string">
            <text:p>Aschegehalt</text:p>
          </table:table-cell>
          <table:table-cell table:number-columns-repeated="2"/>
          <table:table-cell table:style-name="ce1" office:value-type="string" calcext:value-type="string">
            <text:p>Probe</text:p>
          </table:table-cell>
          <table:table-cell table:style-name="ce164" office:value-type="string" calcext:value-type="string">
            <text:p>Mittelwert ADF</text:p>
          </table:table-cell>
          <table:table-cell table:style-name="ce165" office:value-type="string" calcext:value-type="string">
            <text:p>Standardabweichung</text:p>
          </table:table-cell>
          <table:table-cell table:style-name="ce164" office:value-type="string" calcext:value-type="string">
            <text:p>Mittelwert ADL</text:p>
          </table:table-cell>
          <table:table-cell table:style-name="ce165" office:value-type="string" calcext:value-type="string">
            <text:p>Standardabweichung</text:p>
          </table:table-cell>
          <table:table-cell table:style-name="ce164" office:value-type="string" calcext:value-type="string">
            <text:p>Mittelwert AFD-ADL</text:p>
          </table:table-cell>
          <table:table-cell table:style-name="ce165" office:value-type="string" calcext:value-type="string">
            <text:p>Standardabweichung</text:p>
          </table:table-cell>
          <table:table-cell table:style-name="ce164" office:value-type="string" calcext:value-type="string">
            <text:p>Mittelwert AG</text:p>
          </table:table-cell>
          <table:table-cell table:style-name="ce165" office:value-type="string" calcext:value-type="string">
            <text:p>Standardabweichung</text:p>
          </table:table-cell>
        </table:table-row>
        <table:table-row table:style-name="ro2">
          <table:table-cell table:style-name="ce1" office:value-type="string" calcext:value-type="string">
            <text:p>Schilf</text:p>
          </table:table-cell>
          <table:table-cell table:style-name="ce152" office:value-type="float" office:value="68.9264" calcext:value-type="float">
            <text:p>68.9264</text:p>
          </table:table-cell>
          <table:table-cell table:style-name="ce151" office:value-type="float" office:value="12.8382" calcext:value-type="float">
            <text:p>12.8382</text:p>
          </table:table-cell>
          <table:table-cell table:style-name="ce151" table:formula="of:=[.B2]-[.C2]" office:value-type="float" office:value="56.0882" calcext:value-type="float">
            <text:p>56.0882</text:p>
          </table:table-cell>
          <table:table-cell table:style-name="ce160" office:value-type="float" office:value="1.289" calcext:value-type="float">
            <text:p>1.2890</text:p>
          </table:table-cell>
          <table:table-cell table:number-columns-repeated="2"/>
          <table:table-cell table:style-name="ce149" office:value-type="string" calcext:value-type="string">
            <text:p>Schilf</text:p>
          </table:table-cell>
          <table:table-cell table:style-name="ce157" table:formula="of:=[.B2]" office:value-type="float" office:value="68.9264" calcext:value-type="float">
            <text:p>68.9264</text:p>
          </table:table-cell>
          <table:table-cell table:style-name="ce162"/>
          <table:table-cell table:style-name="ce157" table:formula="of:=[.C2]" office:value-type="float" office:value="12.8382" calcext:value-type="float">
            <text:p>12.8382</text:p>
          </table:table-cell>
          <table:table-cell table:style-name="ce162"/>
          <table:table-cell table:style-name="ce157" table:formula="of:=[.D2]" office:value-type="float" office:value="56.0882" calcext:value-type="float">
            <text:p>56.0882</text:p>
          </table:table-cell>
          <table:table-cell table:style-name="ce162"/>
          <table:table-cell table:style-name="ce157" table:formula="of:=[.E2]" office:value-type="float" office:value="1.289" calcext:value-type="float">
            <text:p>1.2890</text:p>
          </table:table-cell>
          <table:table-cell table:style-name="ce162"/>
        </table:table-row>
        <table:table-row table:style-name="ro2">
          <table:table-cell table:style-name="ce148" office:value-type="string" calcext:value-type="string">
            <text:p>IK 1</text:p>
          </table:table-cell>
          <table:table-cell table:style-name="ce153" office:value-type="float" office:value="76.9351" calcext:value-type="float">
            <text:p>76.9351</text:p>
          </table:table-cell>
          <table:table-cell table:style-name="ce156" office:value-type="float" office:value="10.9952" calcext:value-type="float">
            <text:p>10.9952</text:p>
          </table:table-cell>
          <table:table-cell table:formula="of:=[.B3]-[.C3]" office:value-type="float" office:value="65.9399" calcext:value-type="float">
            <text:p>65.9399</text:p>
          </table:table-cell>
          <table:table-cell table:style-name="ce161" office:value-type="float" office:value="2.5117" calcext:value-type="float">
            <text:p>2.5117</text:p>
          </table:table-cell>
          <table:table-cell table:number-columns-repeated="2"/>
          <table:table-cell table:style-name="ce148" office:value-type="string" calcext:value-type="string">
            <text:p>OS Schilf ohne</text:p>
          </table:table-cell>
          <table:table-cell table:style-name="ce156" table:formula="of:=AVERAGE([.B3:.B5])" office:value-type="float" office:value="75.3866666666667" calcext:value-type="float">
            <text:p>75.3867</text:p>
          </table:table-cell>
          <table:table-cell table:style-name="ce161" table:formula="of:=COM.MICROSOFT.STDEV.S([.B3:.B5])" office:value-type="float" office:value="1.75744608546986" calcext:value-type="float">
            <text:p>1.7574</text:p>
          </table:table-cell>
          <table:table-cell table:style-name="ce156" table:formula="of:=AVERAGE([.C3:.C5])" office:value-type="float" office:value="6.6559" calcext:value-type="float">
            <text:p>6.6559</text:p>
          </table:table-cell>
          <table:table-cell table:style-name="ce161" table:formula="of:=COM.MICROSOFT.STDEV.S([.C3:.C5])" office:value-type="float" office:value="5.36362331544638" calcext:value-type="float">
            <text:p>5.3636</text:p>
          </table:table-cell>
          <table:table-cell table:style-name="ce156" table:formula="of:=AVERAGE([.D3:.D5])" office:value-type="float" office:value="68.7307666666667" calcext:value-type="float">
            <text:p>68.7308</text:p>
          </table:table-cell>
          <table:table-cell table:style-name="ce161" table:formula="of:=COM.MICROSOFT.STDEV.S([.D3:.D5])" office:value-type="float" office:value="5.52024198412835" calcext:value-type="float">
            <text:p>5.5202</text:p>
          </table:table-cell>
          <table:table-cell table:style-name="ce156" table:formula="of:=AVERAGE([.E3:.E5])" office:value-type="float" office:value="1.34056666666667" calcext:value-type="float">
            <text:p>1.3406</text:p>
          </table:table-cell>
          <table:table-cell table:style-name="ce161" table:formula="of:=COM.MICROSOFT.STDEV.S([.E3:.E5])" office:value-type="float" office:value="1.15304692590256" calcext:value-type="float">
            <text:p>1.1530</text:p>
          </table:table-cell>
        </table:table-row>
        <table:table-row table:style-name="ro2">
          <table:table-cell office:value-type="string" calcext:value-type="string">
            <text:p>IK 2</text:p>
          </table:table-cell>
          <table:table-cell office:value-type="float" office:value="75.7484" calcext:value-type="float">
            <text:p>75.7484</text:p>
          </table:table-cell>
          <table:table-cell office:value-type="float" office:value="0.6592" calcext:value-type="float">
            <text:p>0.6592</text:p>
          </table:table-cell>
          <table:table-cell table:formula="of:=[.B4]-[.C4]" office:value-type="float" office:value="75.0892" calcext:value-type="float">
            <text:p>75.0892</text:p>
          </table:table-cell>
          <table:table-cell office:value-type="float" office:value="0.2065" calcext:value-type="float">
            <text:p>0.2065</text:p>
          </table:table-cell>
          <table:table-cell table:number-columns-repeated="2"/>
          <table:table-cell table:style-name="ce149" office:value-type="string" calcext:value-type="string">
            <text:p>OS Schilf basisch</text:p>
          </table:table-cell>
          <table:table-cell table:style-name="ce157" table:formula="of:=AVERAGE([.B6:.B8])" office:value-type="float" office:value="61.2079333333333" calcext:value-type="float">
            <text:p>61.2079</text:p>
          </table:table-cell>
          <table:table-cell table:style-name="ce162" table:formula="of:=COM.MICROSOFT.STDEV.S([.B6:.B8])" office:value-type="float" office:value="1.47896176533856" calcext:value-type="float">
            <text:p>1.4790</text:p>
          </table:table-cell>
          <table:table-cell table:style-name="ce157" table:formula="of:=AVERAGE([.C6:.C8])" office:value-type="float" office:value="0.975733333333333" calcext:value-type="float">
            <text:p>0.9757</text:p>
          </table:table-cell>
          <table:table-cell table:style-name="ce162" table:formula="of:=COM.MICROSOFT.STDEV.S([.C6:.C8])" office:value-type="float" office:value="1.12944505990036" calcext:value-type="float">
            <text:p>1.1294</text:p>
          </table:table-cell>
          <table:table-cell table:style-name="ce157" table:formula="of:=AVERAGE([.D6:.D8])" office:value-type="float" office:value="60.2322" calcext:value-type="float">
            <text:p>60.2322</text:p>
          </table:table-cell>
          <table:table-cell table:style-name="ce162" table:formula="of:=COM.MICROSOFT.STDEV.S([.D6:.D8])" office:value-type="float" office:value="2.60783061566506" calcext:value-type="float">
            <text:p>2.6078</text:p>
          </table:table-cell>
          <table:table-cell table:style-name="ce157" table:formula="of:=AVERAGE([.E6:.E8])" office:value-type="float" office:value="0.518766666666667" calcext:value-type="float">
            <text:p>0.5188</text:p>
          </table:table-cell>
          <table:table-cell table:style-name="ce162" table:formula="of:=COM.MICROSOFT.STDEV.S([.E6:.E8])" office:value-type="float" office:value="0.419704804991953" calcext:value-type="float">
            <text:p>0.4197</text:p>
          </table:table-cell>
        </table:table-row>
        <table:table-row table:style-name="ro2">
          <table:table-cell table:style-name="ce150" office:value-type="string" calcext:value-type="string">
            <text:p>IK 3</text:p>
          </table:table-cell>
          <table:table-cell table:style-name="ce155" office:value-type="float" office:value="73.4765" calcext:value-type="float">
            <text:p>73.4765</text:p>
          </table:table-cell>
          <table:table-cell table:style-name="ce158" office:value-type="float" office:value="8.3133" calcext:value-type="float">
            <text:p>8.3133</text:p>
          </table:table-cell>
          <table:table-cell table:formula="of:=[.B5]-[.C5]" office:value-type="float" office:value="65.1632" calcext:value-type="float">
            <text:p>65.1632</text:p>
          </table:table-cell>
          <table:table-cell table:style-name="ce163" office:value-type="float" office:value="1.3035" calcext:value-type="float">
            <text:p>1.3035</text:p>
          </table:table-cell>
          <table:table-cell table:number-columns-repeated="2"/>
          <table:table-cell table:style-name="ce150" office:value-type="string" calcext:value-type="string">
            <text:p>OS Schilf sauer</text:p>
          </table:table-cell>
          <table:table-cell table:style-name="ce158" table:formula="of:=AVERAGE([.B9:.B11])" office:value-type="float" office:value="84.2282" calcext:value-type="float">
            <text:p>84.2282</text:p>
          </table:table-cell>
          <table:table-cell table:style-name="ce163" table:formula="of:=COM.MICROSOFT.STDEV.S([.B9:.B11])" office:value-type="float" office:value="2.54740077137462" calcext:value-type="float">
            <text:p>2.5474</text:p>
          </table:table-cell>
          <table:table-cell table:style-name="ce158" table:formula="of:=AVERAGE([.C9:.C11])" office:value-type="float" office:value="0.5082" calcext:value-type="float">
            <text:p>0.5082</text:p>
          </table:table-cell>
          <table:table-cell table:style-name="ce163" table:formula="of:=COM.MICROSOFT.STDEV.S([.C9:.C11])" office:value-type="float" office:value="0.270935176748978" calcext:value-type="float">
            <text:p>0.2709</text:p>
          </table:table-cell>
          <table:table-cell table:style-name="ce158" table:formula="of:=AVERAGE([.D9:.D11])" office:value-type="float" office:value="83.72" calcext:value-type="float">
            <text:p>83.7200</text:p>
          </table:table-cell>
          <table:table-cell table:style-name="ce163" table:formula="of:=COM.MICROSOFT.STDEV.S([.D9:.D11])" office:value-type="float" office:value="2.81820000000001" calcext:value-type="float">
            <text:p>2.8182</text:p>
          </table:table-cell>
          <table:table-cell table:style-name="ce158" table:formula="of:=AVERAGE([.E9:.E11])" office:value-type="float" office:value="0.201666666666667" calcext:value-type="float">
            <text:p>0.2017</text:p>
          </table:table-cell>
          <table:table-cell table:style-name="ce163" table:formula="of:=COM.MICROSOFT.STDEV.S([.E9:.E11])" office:value-type="float" office:value="0.0692480565310922" calcext:value-type="float">
            <text:p>0.0692</text:p>
          </table:table-cell>
        </table:table-row>
        <table:table-row table:style-name="ro2">
          <table:table-cell table:style-name="ce148" office:value-type="string" calcext:value-type="string">
            <text:p>IK 1B</text:p>
          </table:table-cell>
          <table:table-cell table:style-name="ce153" office:value-type="float" office:value="62.1274" calcext:value-type="float">
            <text:p>62.1274</text:p>
          </table:table-cell>
          <table:table-cell table:style-name="ce156" office:value-type="float" office:value="0.3208" calcext:value-type="float">
            <text:p>0.3208</text:p>
          </table:table-cell>
          <table:table-cell table:style-name="ce156" table:formula="of:=[.B6]-[.C6]" office:value-type="float" office:value="61.8066" calcext:value-type="float">
            <text:p>61.8066</text:p>
          </table:table-cell>
          <table:table-cell table:style-name="ce161" office:value-type="float" office:value="0.5003" calcext:value-type="float">
            <text:p>0.5003</text:p>
          </table:table-cell>
          <table:table-cell table:number-columns-repeated="2"/>
          <table:table-cell table:style-name="ce149" office:value-type="string" calcext:value-type="string">
            <text:p>Rappen</text:p>
          </table:table-cell>
          <table:table-cell table:style-name="ce157" table:formula="of:=[.B12]" office:value-type="float" office:value="71.9673" calcext:value-type="float">
            <text:p>71.9673</text:p>
          </table:table-cell>
          <table:table-cell table:style-name="ce162"/>
          <table:table-cell table:style-name="ce157" table:formula="of:=[.C12]" office:value-type="float" office:value="23.6935" calcext:value-type="float">
            <text:p>23.6935</text:p>
          </table:table-cell>
          <table:table-cell table:style-name="ce162"/>
          <table:table-cell table:style-name="ce157" table:formula="of:=[.D12]" office:value-type="float" office:value="48.2738" calcext:value-type="float">
            <text:p>48.2738</text:p>
          </table:table-cell>
          <table:table-cell table:style-name="ce162"/>
          <table:table-cell table:style-name="ce157" table:formula="of:=[.E12]" office:value-type="float" office:value="0.7698" calcext:value-type="float">
            <text:p>0.7698</text:p>
          </table:table-cell>
          <table:table-cell table:style-name="ce162"/>
        </table:table-row>
        <table:table-row table:style-name="ro2">
          <table:table-cell office:value-type="string" calcext:value-type="string">
            <text:p>IK 2B</text:p>
          </table:table-cell>
          <table:table-cell office:value-type="float" office:value="59.5019" calcext:value-type="float">
            <text:p>59.5019</text:p>
          </table:table-cell>
          <table:table-cell office:value-type="float" office:value="2.2799" calcext:value-type="float">
            <text:p>2.2799</text:p>
          </table:table-cell>
          <table:table-cell table:formula="of:=[.B7]-[.C7]" office:value-type="float" office:value="57.222" calcext:value-type="float">
            <text:p>57.2220</text:p>
          </table:table-cell>
          <table:table-cell office:value-type="float" office:value="0.9474" calcext:value-type="float">
            <text:p>0.9474</text:p>
          </table:table-cell>
          <table:table-cell table:number-columns-repeated="2"/>
          <table:table-cell table:style-name="ce148" office:value-type="string" calcext:value-type="string">
            <text:p>OS Rappen ohne</text:p>
          </table:table-cell>
          <table:table-cell table:style-name="ce153" table:formula="of:=AVERAGE([.B13:.B15])" office:value-type="float" office:value="76.9755666666667" calcext:value-type="float">
            <text:p>76.9756</text:p>
          </table:table-cell>
          <table:table-cell table:style-name="ce161" table:formula="of:=COM.MICROSOFT.STDEV.S([.B13:.B15])" office:value-type="float" office:value="2.57667134367837" calcext:value-type="float">
            <text:p>2.5767</text:p>
          </table:table-cell>
          <table:table-cell table:style-name="ce153" table:formula="of:=AVERAGE([.C13:.C15])" office:value-type="float" office:value="11.8082666666667" calcext:value-type="float">
            <text:p>11.8083</text:p>
          </table:table-cell>
          <table:table-cell table:style-name="ce161" table:formula="of:=COM.MICROSOFT.STDEV.S([.C13:.C15])" office:value-type="float" office:value="11.7220996627453" calcext:value-type="float">
            <text:p>11.7221</text:p>
          </table:table-cell>
          <table:table-cell table:style-name="ce153" table:formula="of:=AVERAGE([.D13:.D15])" office:value-type="float" office:value="65.1673" calcext:value-type="float">
            <text:p>65.1673</text:p>
          </table:table-cell>
          <table:table-cell table:style-name="ce161" table:formula="of:=COM.MICROSOFT.STDEV.S([.D13:.D15])" office:value-type="float" office:value="12.87444974863" calcext:value-type="float">
            <text:p>12.8744</text:p>
          </table:table-cell>
          <table:table-cell table:style-name="ce153" table:formula="of:=AVERAGE([.E13:.E15])" office:value-type="float" office:value="0.3569" calcext:value-type="float">
            <text:p>0.3569</text:p>
          </table:table-cell>
          <table:table-cell table:style-name="ce161" table:formula="of:=COM.MICROSOFT.STDEV.S([.E13:.E15])" office:value-type="float" office:value="0.310462864123876" calcext:value-type="float">
            <text:p>0.3105</text:p>
          </table:table-cell>
        </table:table-row>
        <table:table-row table:style-name="ro2">
          <table:table-cell table:style-name="ce150" office:value-type="string" calcext:value-type="string">
            <text:p>IK 3B</text:p>
          </table:table-cell>
          <table:table-cell table:style-name="ce155" office:value-type="float" office:value="61.9945" calcext:value-type="float">
            <text:p>61.9945</text:p>
          </table:table-cell>
          <table:table-cell table:style-name="ce158" office:value-type="float" office:value="0.3265" calcext:value-type="float">
            <text:p>0.3265</text:p>
          </table:table-cell>
          <table:table-cell table:style-name="ce158" table:formula="of:=[.B8]-[.C8]" office:value-type="float" office:value="61.668" calcext:value-type="float">
            <text:p>61.6680</text:p>
          </table:table-cell>
          <table:table-cell table:style-name="ce163" office:value-type="float" office:value="0.1086" calcext:value-type="float">
            <text:p>0.1086</text:p>
          </table:table-cell>
          <table:table-cell table:number-columns-repeated="2"/>
          <table:table-cell table:style-name="ce149" office:value-type="string" calcext:value-type="string">
            <text:p>OS Rappen basisch</text:p>
          </table:table-cell>
          <table:table-cell table:style-name="ce154" table:formula="of:=AVERAGE([.B16:.B18])" office:value-type="float" office:value="64.3128" calcext:value-type="float">
            <text:p>64.3128</text:p>
          </table:table-cell>
          <table:table-cell table:style-name="ce162" table:formula="of:=COM.MICROSOFT.STDEV.S([.B16:.B18])" office:value-type="float" office:value="2.44906132834603" calcext:value-type="float">
            <text:p>2.4491</text:p>
          </table:table-cell>
          <table:table-cell table:style-name="ce154" table:formula="of:=AVERAGE([.C16:.C18])" office:value-type="float" office:value="2.3832" calcext:value-type="float">
            <text:p>2.3832</text:p>
          </table:table-cell>
          <table:table-cell table:style-name="ce162" table:formula="of:=COM.MICROSOFT.STDEV.S([.C16:.C18])" office:value-type="float" office:value="3.04602234561731" calcext:value-type="float">
            <text:p>3.0460</text:p>
          </table:table-cell>
          <table:table-cell table:style-name="ce154" table:formula="of:=AVERAGE([.D16:.D18])" office:value-type="float" office:value="61.9296" calcext:value-type="float">
            <text:p>61.9296</text:p>
          </table:table-cell>
          <table:table-cell table:style-name="ce162" table:formula="of:=COM.MICROSOFT.STDEV.S([.D16:.D18])" office:value-type="float" office:value="5.17317563301306" calcext:value-type="float">
            <text:p>5.1732</text:p>
          </table:table-cell>
          <table:table-cell table:style-name="ce154" table:formula="of:=AVERAGE([.E16:.E18])" office:value-type="float" office:value="0.136366666666667" calcext:value-type="float">
            <text:p>0.1364</text:p>
          </table:table-cell>
          <table:table-cell table:style-name="ce162" table:formula="of:=COM.MICROSOFT.STDEV.S([.E16:.E18])" office:value-type="float" office:value="0.113346474728301" calcext:value-type="float">
            <text:p>0.1133</text:p>
          </table:table-cell>
        </table:table-row>
        <table:table-row table:style-name="ro2">
          <table:table-cell table:style-name="ce148" office:value-type="string" calcext:value-type="string">
            <text:p>IK 1S</text:p>
          </table:table-cell>
          <table:table-cell table:style-name="ce153" office:value-type="float" office:value="86.5725" calcext:value-type="float">
            <text:p>86.5725</text:p>
          </table:table-cell>
          <table:table-cell table:style-name="ce156" office:value-type="float" office:value="0.2653" calcext:value-type="float">
            <text:p>0.2653</text:p>
          </table:table-cell>
          <table:table-cell table:formula="of:=[.B9]-[.C9]" office:value-type="float" office:value="86.3072" calcext:value-type="float">
            <text:p>86.3072</text:p>
          </table:table-cell>
          <table:table-cell table:style-name="ce161" office:value-type="float" office:value="0.1764" calcext:value-type="float">
            <text:p>0.1764</text:p>
          </table:table-cell>
          <table:table-cell table:number-columns-repeated="2"/>
          <table:table-cell table:style-name="ce150" office:value-type="string" calcext:value-type="string">
            <text:p>OS Rappen sauer</text:p>
          </table:table-cell>
          <table:table-cell table:style-name="ce155" table:formula="of:=AVERAGE([.B19:.B21])" office:value-type="float" office:value="74.5216" calcext:value-type="float">
            <text:p>74.5216</text:p>
          </table:table-cell>
          <table:table-cell table:style-name="ce163" table:formula="of:=COM.MICROSOFT.STDEV.S([.B19:.B21])" office:value-type="float" office:value="0.80081897455043" calcext:value-type="float">
            <text:p>0.8008</text:p>
          </table:table-cell>
          <table:table-cell table:style-name="ce155" table:formula="of:=AVERAGE([.C19:.C21])" office:value-type="float" office:value="14.2430666666667" calcext:value-type="float">
            <text:p>14.2431</text:p>
          </table:table-cell>
          <table:table-cell table:style-name="ce163" table:formula="of:=COM.MICROSOFT.STDEV.S([.C19:.C21])" office:value-type="float" office:value="9.71008120992473" calcext:value-type="float">
            <text:p>9.7101</text:p>
          </table:table-cell>
          <table:table-cell table:style-name="ce155" table:formula="of:=AVERAGE([.D19:.D21])" office:value-type="float" office:value="60.2785333333333" calcext:value-type="float">
            <text:p>60.2785</text:p>
          </table:table-cell>
          <table:table-cell table:style-name="ce163" table:formula="of:=COM.MICROSOFT.STDEV.S([.D19:.D21])" office:value-type="float" office:value="10.5059676585897" calcext:value-type="float">
            <text:p>10.5060</text:p>
          </table:table-cell>
          <table:table-cell table:style-name="ce155" table:formula="of:=AVERAGE([.E19:.E21])" office:value-type="float" office:value="0.3853" calcext:value-type="float">
            <text:p>0.3853</text:p>
          </table:table-cell>
          <table:table-cell table:style-name="ce163" table:formula="of:=COM.MICROSOFT.STDEV.S([.E19:.E21])" office:value-type="float" office:value="0.308923744636116" calcext:value-type="float">
            <text:p>0.3089</text:p>
          </table:table-cell>
        </table:table-row>
        <table:table-row table:style-name="ro2">
          <table:table-cell office:value-type="string" calcext:value-type="string">
            <text:p>IK 2S</text:p>
          </table:table-cell>
          <table:table-cell office:value-type="float" office:value="81.5174" calcext:value-type="float">
            <text:p>81.5174</text:p>
          </table:table-cell>
          <table:table-cell office:value-type="float" office:value="0.8004" calcext:value-type="float">
            <text:p>0.8004</text:p>
          </table:table-cell>
          <table:table-cell table:formula="of:=[.B10]-[.C10]" office:value-type="float" office:value="80.717" calcext:value-type="float">
            <text:p>80.7170</text:p>
          </table:table-cell>
          <table:table-cell office:value-type="float" office:value="0.28" calcext:value-type="float">
            <text:p>0.2800</text:p>
          </table:table-cell>
          <table:table-cell table:number-columns-repeated="2"/>
          <table:table-cell table:style-name="ce149" office:value-type="string" calcext:value-type="string">
            <text:p>Trester</text:p>
          </table:table-cell>
          <table:table-cell table:style-name="ce157" table:formula="of:=[.B22]" office:value-type="float" office:value="57.0248" calcext:value-type="float">
            <text:p>57.0248</text:p>
          </table:table-cell>
          <table:table-cell table:style-name="ce162"/>
          <table:table-cell table:style-name="ce157" table:formula="of:=[.C22]" office:value-type="float" office:value="43.4946" calcext:value-type="float">
            <text:p>43.4946</text:p>
          </table:table-cell>
          <table:table-cell table:style-name="ce162"/>
          <table:table-cell table:style-name="ce157" table:formula="of:=[.D22]" office:value-type="float" office:value="13.5302" calcext:value-type="float">
            <text:p>13.5302</text:p>
          </table:table-cell>
          <table:table-cell table:style-name="ce162"/>
          <table:table-cell table:style-name="ce157" table:formula="of:=[.E22]" office:value-type="float" office:value="0.6316" calcext:value-type="float">
            <text:p>0.6316</text:p>
          </table:table-cell>
          <table:table-cell table:style-name="ce162"/>
        </table:table-row>
        <table:table-row table:style-name="ro2">
          <table:table-cell table:style-name="ce150" office:value-type="string" calcext:value-type="string">
            <text:p>IK 3S</text:p>
          </table:table-cell>
          <table:table-cell table:style-name="ce155" office:value-type="float" office:value="84.5947" calcext:value-type="float">
            <text:p>84.5947</text:p>
          </table:table-cell>
          <table:table-cell table:style-name="ce158" office:value-type="float" office:value="0.4589" calcext:value-type="float">
            <text:p>0.4589</text:p>
          </table:table-cell>
          <table:table-cell table:formula="of:=[.B11]-[.C11]" office:value-type="float" office:value="84.1358" calcext:value-type="float">
            <text:p>84.1358</text:p>
          </table:table-cell>
          <table:table-cell table:style-name="ce163" office:value-type="float" office:value="0.1486" calcext:value-type="float">
            <text:p>0.1486</text:p>
          </table:table-cell>
          <table:table-cell table:number-columns-repeated="2"/>
          <table:table-cell table:style-name="ce148" office:value-type="string" calcext:value-type="string">
            <text:p>OS Trester ohne</text:p>
          </table:table-cell>
          <table:table-cell table:style-name="ce156" table:formula="of:=AVERAGE([.B23:.B25])" office:value-type="float" office:value="87.0256666666667" calcext:value-type="float">
            <text:p>87.0257</text:p>
          </table:table-cell>
          <table:table-cell table:style-name="ce161" table:formula="of:=COM.MICROSOFT.STDEV.S([.B23:.B25])" office:value-type="float" office:value="2.96000527082864" calcext:value-type="float">
            <text:p>2.9600</text:p>
          </table:table-cell>
          <table:table-cell table:style-name="ce156" table:formula="of:=AVERAGE([.C23:.C25])" office:value-type="float" office:value="71.4020333333333" calcext:value-type="float">
            <text:p>71.4020</text:p>
          </table:table-cell>
          <table:table-cell table:style-name="ce161" table:formula="of:=COM.MICROSOFT.STDEV.S([.C23:.C25])" office:value-type="float" office:value="4.89220267398371" calcext:value-type="float">
            <text:p>4.8922</text:p>
          </table:table-cell>
          <table:table-cell table:style-name="ce156" table:formula="of:=AVERAGE([.D23:.D25])" office:value-type="float" office:value="15.6236333333333" calcext:value-type="float">
            <text:p>15.6236</text:p>
          </table:table-cell>
          <table:table-cell table:style-name="ce161" table:formula="of:=COM.MICROSOFT.STDEV.S([.D23:.D25])" office:value-type="float" office:value="2.53171895030498" calcext:value-type="float">
            <text:p>2.5317</text:p>
          </table:table-cell>
          <table:table-cell table:style-name="ce156" table:formula="of:=AVERAGE([.E23:.E25])" office:value-type="float" office:value="9.34793333333333" calcext:value-type="float">
            <text:p>9.3479</text:p>
          </table:table-cell>
          <table:table-cell table:style-name="ce161" table:formula="of:=COM.MICROSOFT.STDEV.S([.E23:.E25])" office:value-type="float" office:value="3.28306082997762" calcext:value-type="float">
            <text:p>3.2831</text:p>
          </table:table-cell>
        </table:table-row>
        <table:table-row table:style-name="ro2">
          <table:table-cell table:style-name="ce1" office:value-type="string" calcext:value-type="string">
            <text:p>Rappen</text:p>
          </table:table-cell>
          <table:table-cell table:style-name="ce152" office:value-type="float" office:value="71.9673" calcext:value-type="float">
            <text:p>71.9673</text:p>
          </table:table-cell>
          <table:table-cell table:style-name="ce151" office:value-type="float" office:value="23.6935" calcext:value-type="float">
            <text:p>23.6935</text:p>
          </table:table-cell>
          <table:table-cell table:style-name="ce151" table:formula="of:=[.B12]-[.C12]" office:value-type="float" office:value="48.2738" calcext:value-type="float">
            <text:p>48.2738</text:p>
          </table:table-cell>
          <table:table-cell table:style-name="ce160" office:value-type="float" office:value="0.7698" calcext:value-type="float">
            <text:p>0.7698</text:p>
          </table:table-cell>
          <table:table-cell table:number-columns-repeated="2"/>
          <table:table-cell table:style-name="ce149" office:value-type="string" calcext:value-type="string">
            <text:p>OS Trester basisch</text:p>
          </table:table-cell>
          <table:table-cell table:style-name="ce157" table:formula="of:=AVERAGE([.B26:.B28])" office:value-type="float" office:value="64.8810333333333" calcext:value-type="float">
            <text:p>64.8810</text:p>
          </table:table-cell>
          <table:table-cell table:style-name="ce162" table:formula="of:=COM.MICROSOFT.STDEV.S([.B26:.B28])" office:value-type="float" office:value="3.4531002900775" calcext:value-type="float">
            <text:p>3.4531</text:p>
          </table:table-cell>
          <table:table-cell table:style-name="ce157" table:formula="of:=AVERAGE([.C26:.C28])" office:value-type="float" office:value="48.4074333333333" calcext:value-type="float">
            <text:p>48.4074</text:p>
          </table:table-cell>
          <table:table-cell table:style-name="ce162" table:formula="of:=COM.MICROSOFT.STDEV.S([.C26:.C28])" office:value-type="float" office:value="3.67345253043146" calcext:value-type="float">
            <text:p>3.6735</text:p>
          </table:table-cell>
          <table:table-cell table:style-name="ce157" table:formula="of:=AVERAGE([.D26:.D28])" office:value-type="float" office:value="16.4736" calcext:value-type="float">
            <text:p>16.4736</text:p>
          </table:table-cell>
          <table:table-cell table:style-name="ce162" table:formula="of:=COM.MICROSOFT.STDEV.S([.D26:.D28])" office:value-type="float" office:value="0.557303256764215" calcext:value-type="float">
            <text:p>0.5573</text:p>
          </table:table-cell>
          <table:table-cell table:style-name="ce157" table:formula="of:=AVERAGE([.E26:.E28])" office:value-type="float" office:value="5.49076666666667" calcext:value-type="float">
            <text:p>5.4908</text:p>
          </table:table-cell>
          <table:table-cell table:style-name="ce162" table:formula="of:=COM.MICROSOFT.STDEV.S([.E26:.E28])" office:value-type="float" office:value="1.54181677683612" calcext:value-type="float">
            <text:p>1.5418</text:p>
          </table:table-cell>
        </table:table-row>
        <table:table-row table:style-name="ro2">
          <table:table-cell table:style-name="ce148" office:value-type="string" calcext:value-type="string">
            <text:p>IK 4</text:p>
          </table:table-cell>
          <table:table-cell table:style-name="ce153" office:value-type="float" office:value="79.9485" calcext:value-type="float">
            <text:p>79.9485</text:p>
          </table:table-cell>
          <table:table-cell table:style-name="ce156" office:value-type="float" office:value="6.4468" calcext:value-type="float">
            <text:p>6.4468</text:p>
          </table:table-cell>
          <table:table-cell table:formula="of:=[.B13]-[.C13]" office:value-type="float" office:value="73.5017" calcext:value-type="float">
            <text:p>73.5017</text:p>
          </table:table-cell>
          <table:table-cell table:style-name="ce161" office:value-type="float" office:value="0.1879" calcext:value-type="float">
            <text:p>0.1879</text:p>
          </table:table-cell>
          <table:table-cell table:number-columns-repeated="2"/>
          <table:table-cell table:style-name="ce150" office:value-type="string" calcext:value-type="string">
            <text:p>OS Trester sauer</text:p>
          </table:table-cell>
          <table:table-cell table:style-name="ce158" table:formula="of:=AVERAGE([.B29:.B31])" office:value-type="float" office:value="88.8801666666667" calcext:value-type="float">
            <text:p>88.8802</text:p>
          </table:table-cell>
          <table:table-cell table:style-name="ce163" table:formula="of:=COM.MICROSOFT.STDEV.S([.B29:.B31])" office:value-type="float" office:value="4.01986283638302" calcext:value-type="float">
            <text:p>4.0199</text:p>
          </table:table-cell>
          <table:table-cell table:style-name="ce158" table:formula="of:=AVERAGE([.C29:.C31])" office:value-type="float" office:value="73.6674" calcext:value-type="float">
            <text:p>73.6674</text:p>
          </table:table-cell>
          <table:table-cell table:style-name="ce163" table:formula="of:=COM.MICROSOFT.STDEV.S([.C29:.C31])" office:value-type="float" office:value="7.73809235470862" calcext:value-type="float">
            <text:p>7.7381</text:p>
          </table:table-cell>
          <table:table-cell table:style-name="ce158" table:formula="of:=AVERAGE([.D29:.D31])" office:value-type="float" office:value="15.2127666666667" calcext:value-type="float">
            <text:p>15.2128</text:p>
          </table:table-cell>
          <table:table-cell table:style-name="ce163" table:formula="of:=COM.MICROSOFT.STDEV.S([.D29:.D31])" office:value-type="float" office:value="4.08689815426483" calcext:value-type="float">
            <text:p>4.0869</text:p>
          </table:table-cell>
          <table:table-cell table:style-name="ce158" table:formula="of:=AVERAGE([.E29:.E31])" office:value-type="float" office:value="20.9292333333333" calcext:value-type="float">
            <text:p>20.9292</text:p>
          </table:table-cell>
          <table:table-cell table:style-name="ce163" table:formula="of:=COM.MICROSOFT.STDEV.S([.E29:.E31])" office:value-type="float" office:value="4.89340586537979" calcext:value-type="float">
            <text:p>4.8934</text:p>
          </table:table-cell>
        </table:table-row>
        <table:table-row table:style-name="ro2">
          <table:table-cell office:value-type="string" calcext:value-type="string">
            <text:p>IK 5</text:p>
          </table:table-cell>
          <table:table-cell office:value-type="float" office:value="75.3867" calcext:value-type="float">
            <text:p>75.3867</text:p>
          </table:table-cell>
          <table:table-cell office:value-type="float" office:value="3.7257" calcext:value-type="float">
            <text:p>3.7257</text:p>
          </table:table-cell>
          <table:table-cell table:formula="of:=[.B14]-[.C14]" office:value-type="float" office:value="71.661" calcext:value-type="float">
            <text:p>71.6610</text:p>
          </table:table-cell>
          <table:table-cell office:value-type="float" office:value="0.1676" calcext:value-type="float">
            <text:p>0.1676</text:p>
          </table:table-cell>
          <table:table-cell table:number-columns-repeated="11"/>
        </table:table-row>
        <table:table-row table:style-name="ro2">
          <table:table-cell table:style-name="ce150" office:value-type="string" calcext:value-type="string">
            <text:p>IK 6</text:p>
          </table:table-cell>
          <table:table-cell table:style-name="ce155" office:value-type="float" office:value="75.5915" calcext:value-type="float">
            <text:p>75.5915</text:p>
          </table:table-cell>
          <table:table-cell table:style-name="ce158" office:value-type="float" office:value="25.2523" calcext:value-type="float">
            <text:p>25.2523</text:p>
          </table:table-cell>
          <table:table-cell table:formula="of:=[.B15]-[.C15]" office:value-type="float" office:value="50.3392" calcext:value-type="float">
            <text:p>50.3392</text:p>
          </table:table-cell>
          <table:table-cell table:style-name="ce163" office:value-type="float" office:value="0.7152" calcext:value-type="float">
            <text:p>0.7152</text:p>
          </table:table-cell>
          <table:table-cell table:number-columns-repeated="11"/>
        </table:table-row>
        <table:table-row table:style-name="ro2">
          <table:table-cell table:style-name="ce148" office:value-type="string" calcext:value-type="string">
            <text:p>IK 4B</text:p>
          </table:table-cell>
          <table:table-cell table:style-name="ce153" office:value-type="float" office:value="63.9311" calcext:value-type="float">
            <text:p>63.9311</text:p>
          </table:table-cell>
          <table:table-cell table:style-name="ce156" office:value-type="float" office:value="0.5243" calcext:value-type="float">
            <text:p>0.5243</text:p>
          </table:table-cell>
          <table:table-cell table:style-name="ce156" table:formula="of:=[.B16]-[.C16]" office:value-type="float" office:value="63.4068" calcext:value-type="float">
            <text:p>63.4068</text:p>
          </table:table-cell>
          <table:table-cell table:style-name="ce161" office:value-type="float" office:value="0.0834" calcext:value-type="float">
            <text:p>0.083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5B</text:p>
          </table:table-cell>
          <table:table-cell office:value-type="float" office:value="66.9303" calcext:value-type="float">
            <text:p>66.9303</text:p>
          </table:table-cell>
          <table:table-cell office:value-type="float" office:value="0.7268" calcext:value-type="float">
            <text:p>0.7268</text:p>
          </table:table-cell>
          <table:table-cell table:formula="of:=[.B17]-[.C17]" office:value-type="float" office:value="66.2035" calcext:value-type="float">
            <text:p>66.2035</text:p>
          </table:table-cell>
          <table:table-cell office:value-type="float" office:value="0.0592" calcext:value-type="float">
            <text:p>0.0592</text:p>
          </table:table-cell>
          <table:table-cell table:number-columns-repeated="11"/>
        </table:table-row>
        <table:table-row table:style-name="ro2">
          <table:table-cell table:style-name="ce150" office:value-type="string" calcext:value-type="string">
            <text:p>IK 6B</text:p>
          </table:table-cell>
          <table:table-cell table:style-name="ce155" office:value-type="float" office:value="62.077" calcext:value-type="float">
            <text:p>62.0770</text:p>
          </table:table-cell>
          <table:table-cell table:style-name="ce158" office:value-type="float" office:value="5.8985" calcext:value-type="float">
            <text:p>5.8985</text:p>
          </table:table-cell>
          <table:table-cell table:style-name="ce158" table:formula="of:=[.B18]-[.C18]" office:value-type="float" office:value="56.1785" calcext:value-type="float">
            <text:p>56.1785</text:p>
          </table:table-cell>
          <table:table-cell table:style-name="ce163" office:value-type="float" office:value="0.2665" calcext:value-type="float">
            <text:p>0.2665</text:p>
          </table:table-cell>
          <table:table-cell table:number-columns-repeated="11"/>
        </table:table-row>
        <table:table-row table:style-name="ro2">
          <table:table-cell table:style-name="ce148" office:value-type="string" calcext:value-type="string">
            <text:p>IK 4S</text:p>
          </table:table-cell>
          <table:table-cell table:style-name="ce153" office:value-type="float" office:value="75.3882" calcext:value-type="float">
            <text:p>75.3882</text:p>
          </table:table-cell>
          <table:table-cell table:style-name="ce156" office:value-type="float" office:value="3.3545" calcext:value-type="float">
            <text:p>3.3545</text:p>
          </table:table-cell>
          <table:table-cell table:formula="of:=[.B19]-[.C19]" office:value-type="float" office:value="72.0337" calcext:value-type="float">
            <text:p>72.0337</text:p>
          </table:table-cell>
          <table:table-cell table:style-name="ce161" office:value-type="float" office:value="0.0297" calcext:value-type="float">
            <text:p>0.029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5S</text:p>
          </table:table-cell>
          <table:table-cell office:value-type="float" office:value="74.3677" calcext:value-type="float">
            <text:p>74.3677</text:p>
          </table:table-cell>
          <table:table-cell office:value-type="float" office:value="17.3711" calcext:value-type="float">
            <text:p>17.3711</text:p>
          </table:table-cell>
          <table:table-cell table:formula="of:=[.B20]-[.C20]" office:value-type="float" office:value="56.9966" calcext:value-type="float">
            <text:p>56.9966</text:p>
          </table:table-cell>
          <table:table-cell office:value-type="float" office:value="0.5387" calcext:value-type="float">
            <text:p>0.5387</text:p>
          </table:table-cell>
          <table:table-cell table:number-columns-repeated="11"/>
        </table:table-row>
        <table:table-row table:style-name="ro2">
          <table:table-cell table:style-name="ce150" office:value-type="string" calcext:value-type="string">
            <text:p>IK 6S</text:p>
          </table:table-cell>
          <table:table-cell table:style-name="ce155" office:value-type="float" office:value="73.8089" calcext:value-type="float">
            <text:p>73.8089</text:p>
          </table:table-cell>
          <table:table-cell table:style-name="ce158" office:value-type="float" office:value="22.0036" calcext:value-type="float">
            <text:p>22.0036</text:p>
          </table:table-cell>
          <table:table-cell table:formula="of:=[.B21]-[.C21]" office:value-type="float" office:value="51.8053" calcext:value-type="float">
            <text:p>51.8053</text:p>
          </table:table-cell>
          <table:table-cell table:style-name="ce163" office:value-type="float" office:value="0.5875" calcext:value-type="float">
            <text:p>0.587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ester</text:p>
          </table:table-cell>
          <table:table-cell table:style-name="ce152" office:value-type="float" office:value="57.0248" calcext:value-type="float">
            <text:p>57.0248</text:p>
          </table:table-cell>
          <table:table-cell table:style-name="ce151" office:value-type="float" office:value="43.4946" calcext:value-type="float">
            <text:p>43.4946</text:p>
          </table:table-cell>
          <table:table-cell table:style-name="ce151" table:formula="of:=[.B22]-[.C22]" office:value-type="float" office:value="13.5302" calcext:value-type="float">
            <text:p>13.5302</text:p>
          </table:table-cell>
          <table:table-cell table:style-name="ce160" office:value-type="float" office:value="0.6316" calcext:value-type="float">
            <text:p>0.6316</text:p>
          </table:table-cell>
          <table:table-cell table:number-columns-repeated="11"/>
        </table:table-row>
        <table:table-row table:style-name="ro2">
          <table:table-cell table:style-name="ce148" office:value-type="string" calcext:value-type="string">
            <text:p>IK 7</text:p>
          </table:table-cell>
          <table:table-cell table:style-name="ce153" office:value-type="float" office:value="85.7173" calcext:value-type="float">
            <text:p>85.7173</text:p>
          </table:table-cell>
          <table:table-cell table:style-name="ce156" office:value-type="float" office:value="71.6305" calcext:value-type="float">
            <text:p>71.6305</text:p>
          </table:table-cell>
          <table:table-cell table:formula="of:=[.B23]-[.C23]" office:value-type="float" office:value="14.0868" calcext:value-type="float">
            <text:p>14.0868</text:p>
          </table:table-cell>
          <table:table-cell table:style-name="ce161" office:value-type="float" office:value="10.8842" calcext:value-type="float">
            <text:p>10.88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8</text:p>
          </table:table-cell>
          <table:table-cell office:value-type="float" office:value="84.9453" calcext:value-type="float">
            <text:p>84.9453</text:p>
          </table:table-cell>
          <table:table-cell office:value-type="float" office:value="66.3996" calcext:value-type="float">
            <text:p>66.3996</text:p>
          </table:table-cell>
          <table:table-cell table:formula="of:=[.B24]-[.C24]" office:value-type="float" office:value="18.5457" calcext:value-type="float">
            <text:p>18.5457</text:p>
          </table:table-cell>
          <table:table-cell office:value-type="float" office:value="5.5784" calcext:value-type="float">
            <text:p>5.5784</text:p>
          </table:table-cell>
          <table:table-cell table:number-columns-repeated="11"/>
        </table:table-row>
        <table:table-row table:style-name="ro2">
          <table:table-cell table:style-name="ce150" office:value-type="string" calcext:value-type="string">
            <text:p>IK 9</text:p>
          </table:table-cell>
          <table:table-cell table:style-name="ce155" office:value-type="float" office:value="90.4144" calcext:value-type="float">
            <text:p>90.4144</text:p>
          </table:table-cell>
          <table:table-cell table:style-name="ce158" office:value-type="float" office:value="76.176" calcext:value-type="float">
            <text:p>76.1760</text:p>
          </table:table-cell>
          <table:table-cell table:formula="of:=[.B25]-[.C25]" office:value-type="float" office:value="14.2384" calcext:value-type="float">
            <text:p>14.2384</text:p>
          </table:table-cell>
          <table:table-cell table:style-name="ce163" office:value-type="float" office:value="11.5812" calcext:value-type="float">
            <text:p>11.58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7B</text:p>
          </table:table-cell>
          <table:table-cell table:style-name="ce153" office:value-type="float" office:value="65.6211" calcext:value-type="float">
            <text:p>65.6211</text:p>
          </table:table-cell>
          <table:table-cell table:style-name="ce156" office:value-type="float" office:value="49.7841" calcext:value-type="float">
            <text:p>49.7841</text:p>
          </table:table-cell>
          <table:table-cell table:style-name="ce156" table:formula="of:=[.B26]-[.C26]" office:value-type="float" office:value="15.837" calcext:value-type="float">
            <text:p>15.8370</text:p>
          </table:table-cell>
          <table:table-cell table:style-name="ce161" office:value-type="float" office:value="7.1921" calcext:value-type="float">
            <text:p>7.19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8B</text:p>
          </table:table-cell>
          <table:table-cell office:value-type="float" office:value="61.1179" calcext:value-type="float">
            <text:p>61.1179</text:p>
          </table:table-cell>
          <table:table-cell office:value-type="float" office:value="44.2445" calcext:value-type="float">
            <text:p>44.2445</text:p>
          </table:table-cell>
          <table:table-cell table:formula="of:=[.B27]-[.C27]" office:value-type="float" office:value="16.8734" calcext:value-type="float">
            <text:p>16.8734</text:p>
          </table:table-cell>
          <table:table-cell office:value-type="float" office:value="4.1859" calcext:value-type="float">
            <text:p>4.185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9B</text:p>
          </table:table-cell>
          <table:table-cell office:value-type="float" office:value="67.9041" calcext:value-type="float">
            <text:p>67.9041</text:p>
          </table:table-cell>
          <table:table-cell office:value-type="float" office:value="51.1937" calcext:value-type="float">
            <text:p>51.1937</text:p>
          </table:table-cell>
          <table:table-cell table:formula="of:=[.B28]-[.C28]" office:value-type="float" office:value="16.7104" calcext:value-type="float">
            <text:p>16.7104</text:p>
          </table:table-cell>
          <table:table-cell office:value-type="float" office:value="5.0943" calcext:value-type="float">
            <text:p>5.0943</text:p>
          </table:table-cell>
          <table:table-cell table:number-columns-repeated="11"/>
        </table:table-row>
        <table:table-row table:style-name="ro2">
          <table:table-cell table:style-name="ce148" office:value-type="string" calcext:value-type="string">
            <text:p>IK 7S</text:p>
          </table:table-cell>
          <table:table-cell table:style-name="ce153" office:value-type="float" office:value="85.8682" calcext:value-type="float">
            <text:p>85.8682</text:p>
          </table:table-cell>
          <table:table-cell table:style-name="ce156" office:value-type="float" office:value="66.0939" calcext:value-type="float">
            <text:p>66.0939</text:p>
          </table:table-cell>
          <table:table-cell table:style-name="ce156" table:formula="of:=[.B29]-[.C29]" office:value-type="float" office:value="19.7743" calcext:value-type="float">
            <text:p>19.7743</text:p>
          </table:table-cell>
          <table:table-cell table:style-name="ce161" office:value-type="float" office:value="17.3288" calcext:value-type="float">
            <text:p>17.32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K 8S</text:p>
          </table:table-cell>
          <table:table-cell office:value-type="float" office:value="87.3275" calcext:value-type="float">
            <text:p>87.3275</text:p>
          </table:table-cell>
          <table:table-cell office:value-type="float" office:value="73.3481" calcext:value-type="float">
            <text:p>73.3481</text:p>
          </table:table-cell>
          <table:table-cell table:formula="of:=[.B30]-[.C30]" office:value-type="float" office:value="13.9794" calcext:value-type="float">
            <text:p>13.9794</text:p>
          </table:table-cell>
          <table:table-cell office:value-type="float" office:value="26.5008" calcext:value-type="float">
            <text:p>26.5008</text:p>
          </table:table-cell>
          <table:table-cell table:number-columns-repeated="11"/>
        </table:table-row>
        <table:table-row table:style-name="ro2">
          <table:table-cell table:style-name="ce150" office:value-type="string" calcext:value-type="string">
            <text:p>IK 9S</text:p>
          </table:table-cell>
          <table:table-cell table:style-name="ce155" office:value-type="float" office:value="93.4448" calcext:value-type="float">
            <text:p>93.4448</text:p>
          </table:table-cell>
          <table:table-cell table:style-name="ce158" office:value-type="float" office:value="81.5602" calcext:value-type="float">
            <text:p>81.5602</text:p>
          </table:table-cell>
          <table:table-cell table:style-name="ce158" table:formula="of:=[.B31]-[.C31]" office:value-type="float" office:value="11.8846" calcext:value-type="float">
            <text:p>11.8846</text:p>
          </table:table-cell>
          <table:table-cell table:style-name="ce163" office:value-type="float" office:value="18.9581" calcext:value-type="float">
            <text:p>18.958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£</number:text>
      <number:fill-character> </number:fill-character>
      <number:text>- _-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11" number:min-decimal-places="11"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number:number-style style:name="N161">
      <number:number number:decimal-places="15" number:min-decimal-places="15" number:min-integer-digits="1"/>
    </number:number-style>
    <number:number-style style:name="N162">
      <number:number number:decimal-places="17" number:min-decimal-places="17" number:min-integer-digits="1"/>
    </number:number-style>
    <number:number-style style:name="N163">
      <number:number number:decimal-places="18" number:min-decimal-places="18" number:min-integer-digits="1"/>
    </number:number-style>
    <number:number-style style:name="N164">
      <number:number number:decimal-places="19" number:min-decimal-places="19" number:min-integer-digits="1"/>
    </number:number-style>
    <number:number-style style:name="N16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3:16:34.276239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5:41:27.581798900</meta:creation-date>
    <dc:date>2026-05-25T13:17:03.862596100</dc:date>
    <meta:editing-duration>PT1H35M54S</meta:editing-duration>
    <meta:editing-cycles>10</meta:editing-cycles>
    <meta:generator>LibreOffice/25.8.6.2$Windows_X86_64 LibreOffice_project/b4b39682cd9868fa725bc664aff94278d315bd04</meta:generator>
    <meta:document-statistic meta:table-count="2" meta:cell-count="846" meta:object-count="0"/>
  </office:meta>
</office:document-meta>
</file>